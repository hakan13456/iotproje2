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9528in" table:align="left"/>
    </style:style>
    <style:style style:name="Table1.A" style:family="table-column">
      <style:table-column-properties style:column-width="1.2833in"/>
    </style:style>
    <style:style style:name="Table1.B" style:family="table-column">
      <style:table-column-properties style:column-width="0.669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3.1681in"/>
    </style:style>
    <style:style style:name="Table2.B" style:family="table-column">
      <style:table-column-properties style:column-width="3.52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5681in" table:align="left"/>
    </style:style>
    <style:style style:name="Table3.A" style:family="table-column">
      <style:table-column-properties style:column-width="0.8431in"/>
    </style:style>
    <style:style style:name="Table3.B" style:family="table-column">
      <style:table-column-properties style:column-width="0.72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5681in" table:align="left"/>
    </style:style>
    <style:style style:name="Table4.A" style:family="table-column">
      <style:table-column-properties style:column-width="0.8431in"/>
    </style:style>
    <style:style style:name="Table4.B" style:family="table-column">
      <style:table-column-properties style:column-width="0.72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5681in" table:align="left"/>
    </style:style>
    <style:style style:name="Table5.A" style:family="table-column">
      <style:table-column-properties style:column-width="0.8431in"/>
    </style:style>
    <style:style style:name="Table5.B" style:family="table-column">
      <style:table-column-properties style:column-width="0.72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2736in" table:align="left"/>
    </style:style>
    <style:style style:name="Table6.A" style:family="table-column">
      <style:table-column-properties style:column-width="1.184in"/>
    </style:style>
    <style:style style:name="Table6.B" style:family="table-column">
      <style:table-column-properties style:column-width="3.089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9146in" table:align="left"/>
    </style:style>
    <style:style style:name="Table7.A" style:family="table-column">
      <style:table-column-properties style:column-width="1.1896in"/>
    </style:style>
    <style:style style:name="Table7.B" style:family="table-column">
      <style:table-column-properties style:column-width="0.725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3861in" table:align="left"/>
    </style:style>
    <style:style style:name="Table8.A" style:family="table-column">
      <style:table-column-properties style:column-width="2.8278in"/>
    </style:style>
    <style:style style:name="Table8.B" style:family="table-column">
      <style:table-column-properties style:column-width="2.5583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709in" table:align="left"/>
    </style:style>
    <style:style style:name="Table9.A" style:family="table-column">
      <style:table-column-properties style:column-width="2.7354in"/>
    </style:style>
    <style:style style:name="Table9.B" style:family="table-column">
      <style:table-column-properties style:column-width="2.0403in"/>
    </style:style>
    <style:style style:name="Table9.C" style:family="table-column">
      <style:table-column-properties style:column-width="0.9333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2319in" table:align="left"/>
    </style:style>
    <style:style style:name="Table10.A" style:family="table-column">
      <style:table-column-properties style:column-width="1.4438in"/>
    </style:style>
    <style:style style:name="Table10.B" style:family="table-column">
      <style:table-column-properties style:column-width="2.788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2.8229in" table:align="left"/>
    </style:style>
    <style:style style:name="Table11.A" style:family="table-column">
      <style:table-column-properties style:column-width="2.2924in"/>
    </style:style>
    <style:style style:name="Table11.B" style:family="table-column">
      <style:table-column-properties style:column-width="0.530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1.9146in" table:align="left"/>
    </style:style>
    <style:style style:name="Table12.A" style:family="table-column">
      <style:table-column-properties style:column-width="1.1896in"/>
    </style:style>
    <style:style style:name="Table12.B" style:family="table-column">
      <style:table-column-properties style:column-width="0.725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4042in" table:align="left"/>
    </style:style>
    <style:style style:name="Table13.A" style:family="table-column">
      <style:table-column-properties style:column-width="0.9938in"/>
    </style:style>
    <style:style style:name="Table13.B" style:family="table-column">
      <style:table-column-properties style:column-width="0.410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.6514in" table:align="left"/>
    </style:style>
    <style:style style:name="Table14.A" style:family="table-column">
      <style:table-column-properties style:column-width="0.8431in"/>
    </style:style>
    <style:style style:name="Table14.B" style:family="table-column">
      <style:table-column-properties style:column-width="0.8083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1.6514in" table:align="left"/>
    </style:style>
    <style:style style:name="Table15.A" style:family="table-column">
      <style:table-column-properties style:column-width="0.8431in"/>
    </style:style>
    <style:style style:name="Table15.B" style:family="table-column">
      <style:table-column-properties style:column-width="0.8083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1.6514in" table:align="left"/>
    </style:style>
    <style:style style:name="Table16.A" style:family="table-column">
      <style:table-column-properties style:column-width="0.8431in"/>
    </style:style>
    <style:style style:name="Table16.B" style:family="table-column">
      <style:table-column-properties style:column-width="0.8083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3.9465in" table:align="left"/>
    </style:style>
    <style:style style:name="Table17.A" style:family="table-column">
      <style:table-column-properties style:column-width="1.184in"/>
    </style:style>
    <style:style style:name="Table17.B" style:family="table-column">
      <style:table-column-properties style:column-width="2.7625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5.2924in" table:align="left"/>
    </style:style>
    <style:style style:name="Table18.A" style:family="table-column">
      <style:table-column-properties style:column-width="1.8563in"/>
    </style:style>
    <style:style style:name="Table18.B" style:family="table-column">
      <style:table-column-properties style:column-width="1.3688in"/>
    </style:style>
    <style:style style:name="Table18.C" style:family="table-column">
      <style:table-column-properties style:column-width="2.0674in"/>
    </style:style>
    <style:style style:name="Table18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Genel paket özeti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Ölçüt</text:p>
            </table:table-cell>
            <table:table-cell table:style-name="Table1.A1" office:value-type="string">
              <text:p text:style-name="Table_20_Heading">Değer</text:p>
            </table:table-cell>
          </table:table-row>
        </table:table-header-rows>
        <table:table-row>
          <table:table-cell table:style-name="Table1.A1" office:value-type="string">
            <text:p text:style-name="Table_20_Contents">Toplam paket</text:p>
          </table:table-cell>
          <table:table-cell table:style-name="Table1.A1" office:value-type="string">
            <text:p text:style-name="Table_20_Contents"><text:span text:style-name="Strong_20_Emphasis">562</text:span></text:p>
          </table:table-cell>
        </table:table-row>
        <table:table-row>
          <table:table-cell table:style-name="Table1.A1" office:value-type="string">
            <text:p text:style-name="Table_20_Contents">Kayıt süresi</text:p>
          </table:table-cell>
          <table:table-cell table:style-name="Table1.A1" office:value-type="string">
            <text:p text:style-name="Table_20_Contents"><text:span text:style-name="Strong_20_Emphasis">144.54 s</text:span></text:p>
          </table:table-cell>
        </table:table-row>
        <table:table-row>
          <table:table-cell table:style-name="Table1.A1" office:value-type="string">
            <text:p text:style-name="Table_20_Contents">ICMPv6 paketleri</text:p>
          </table:table-cell>
          <table:table-cell table:style-name="Table1.A1" office:value-type="string">
            <text:p text:style-name="Table_20_Contents"><text:span text:style-name="Strong_20_Emphasis">354</text:span></text:p>
          </table:table-cell>
        </table:table-row>
        <table:table-row>
          <table:table-cell table:style-name="Table1.A1" office:value-type="string">
            <text:p text:style-name="Table_20_Contents">TCP paketleri</text:p>
          </table:table-cell>
          <table:table-cell table:style-name="Table1.A1" office:value-type="string">
            <text:p text:style-name="Table_20_Contents"><text:span text:style-name="Strong_20_Emphasis">185</text:span></text:p>
          </table:table-cell>
        </table:table-row>
        <table:table-row>
          <table:table-cell table:style-name="Table1.A1" office:value-type="string">
            <text:p text:style-name="Table_20_Contents">UDP paketleri</text:p>
          </table:table-cell>
          <table:table-cell table:style-name="Table1.A1" office:value-type="string">
            <text:p text:style-name="Table_20_Contents"><text:span text:style-name="Strong_20_Emphasis">23</text:span></text:p>
          </table:table-cell>
        </table:table-row>
      </table:table>
      <text:p text:style-name="Horizontal_20_Line"/>
      <text:h text:style-name="Heading_20_1" text:outline-level="1">2. Ağdaki önemli adresler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Rol</text:p>
            </table:table-cell>
            <table:table-cell table:style-name="Table2.A1" office:value-type="string">
              <text:p text:style-name="Table_20_Heading">IPv6 adresi</text:p>
            </table:table-cell>
          </table:table-row>
        </table:table-header-rows>
        <table:table-row>
          <table:table-cell table:style-name="Table2.A1" office:value-type="string">
            <text:p text:style-name="Table_20_Contents">Broker <text:span text:style-name="Source_20_Text">node-a8-101</text:span></text:p>
          </table:table-cell>
          <table:table-cell table:style-name="Table2.A1" office:value-type="string">
            <text:p text:style-name="Table_20_Contents"><text:span text:style-name="Source_20_Text">2001:660:3207:400::65</text:span></text:p>
          </table:table-cell>
        </table:table-row>
        <table:table-row>
          <table:table-cell table:style-name="Table2.A1" office:value-type="string">
            <text:p text:style-name="Table_20_Contents">MQTT-SN emCute client</text:p>
          </table:table-cell>
          <table:table-cell table:style-name="Table2.A1" office:value-type="string">
            <text:p text:style-name="Table_20_Contents"><text:span text:style-name="Source_20_Text">2001:660:3207:464:a4cf:e1be:f142:3f06</text:span></text:p>
          </table:table-cell>
        </table:table-row>
        <table:table-row>
          <table:table-cell table:style-name="Table2.A1" office:value-type="string">
            <text:p text:style-name="Table_20_Contents">Saclay MQTT istemcisi (<text:span text:style-name="Source_20_Text">mosquitto_pub/sub</text:span>)</text:p>
          </table:table-cell>
          <table:table-cell table:style-name="Table2.A1" office:value-type="string">
            <text:p text:style-name="Table_20_Contents"><text:span text:style-name="Source_20_Text">2001:660:3207:4bf::17</text:span></text:p>
          </table:table-cell>
        </table:table-row>
      </table:table>
      <text:p text:style-name="Horizontal_20_Line"/>
      <text:h text:style-name="Heading_20_1" text:outline-level="1">3. MQTT → Broker → MQTT-SN Client akışı başarılı</text:h>
      <text:p text:style-name="Text_20_body">PCAP içinde şu mesajlar görüldü:</text:p>
      <text:section text:style-name="Sect1" text:name="code-block-viewer">
        <text:p text:style-name="P1"><text:span text:style-name="Source_20_Text">paket_analiz_testi</text:span></text:p>
        <text:p text:style-name="Preformatted_20_Text"><text:span text:style-name="Source_20_Text">tree_msg_1</text:span></text:p>
        <text:p text:style-name="Preformatted_20_Text"><text:span text:style-name="Source_20_Text">tree_msg_2</text:span></text:p>
        <text:p text:style-name="Preformatted_20_Text"><text:span text:style-name="Source_20_Text">tree_msg_3</text:span></text:p>
        <text:p text:style-name="Preformatted_20_Text"><text:span text:style-name="Source_20_Text">tree_msg_4</text:span></text:p>
        <text:p text:style-name="Preformatted_20_Text"><text:span text:style-name="Source_20_Text">tree_msg_5</text:span></text:p>
        <text:p text:style-name="Preformatted_20_Text"><text:span text:style-name="Source_20_Text">tree_msg_6</text:span></text:p>
        <text:p text:style-name="Preformatted_20_Text"><text:span text:style-name="Source_20_Text">tree_msg_7</text:span></text:p>
        <text:p text:style-name="Preformatted_20_Text"><text:span text:style-name="Source_20_Text">tree_msg_8</text:span></text:p>
        <text:p text:style-name="Preformatted_20_Text"><text:span text:style-name="Source_20_Text">tree_msg_9</text:span></text:p>
        <text:p text:style-name="P3"><text:span text:style-name="Source_20_Text">tree_msg_10</text:span></text:p>
      </text:section>
      <text:p text:style-name="Text_20_body">Toplam:</text:p>
      <text:section text:style-name="Sect1" text:name="Section1">
        <text:p text:style-name="P1"><text:bookmark text:name="code-block-viewer"/><text:span text:style-name="Source_20_Text">11 mesaj gönderilmiş</text:span></text:p>
        <text:p text:style-name="Preformatted_20_Text"><text:span text:style-name="Source_20_Text">11 mesaj MQTT-SN client’a iletilmiş</text:span></text:p>
        <text:p text:style-name="P3"><text:span text:style-name="Source_20_Text">11 PUBACK alınmış</text:span></text:p>
      </text:section>
      <text:h text:style-name="Heading_20_2" text:outline-level="2">Başarı oranı</text:h>
      <text:section text:style-name="Sect1" text:name="Section2">
        <text:p text:style-name="P2"><text:bookmark text:name="code-block-viewer Copy 1"/><text:span text:style-name="Source_20_Text">11 / 11 = %100 iletim başarısı</text:span></text:p>
      </text:section>
      <text:p text:style-name="Text_20_body">Özellikle senin 10 mesajlık testin:</text:p>
      <text:section text:style-name="Sect1" text:name="Section3">
        <text:p text:style-name="P2"><text:bookmark text:name="code-block-viewer Copy 2"/><text:span text:style-name="Source_20_Text">tree_msg_1 ... tree_msg_10</text:span></text:p>
      </text:section>
      <text:p text:style-name="Text_20_body"><text:soft-page-break/>için:</text:p>
      <text:section text:style-name="Sect1" text:name="Section4">
        <text:p text:style-name="P2"><text:bookmark text:name="code-block-viewer Copy 3"/><text:span text:style-name="Source_20_Text">10 / 10 mesaj başarıyla MQTT-SN client’a ulaşmış.</text:span></text:p>
      </text:section>
      <text:p text:style-name="Horizontal_20_Line"/>
      <text:h text:style-name="Heading_20_1" text:outline-level="1">4. Paket akışı örneği</text:h>
      <text:h text:style-name="Heading_20_2" text:outline-level="2"><text:span text:style-name="Source_20_Text">paket_analiz_testi</text:span> mesajı</text:h>
      <text:h text:style-name="Heading_20_3" text:outline-level="3">Aşama 1 — MQTT mesajı broker’a geliyor</text:h>
      <text:section text:style-name="Sect1" text:name="Section5">
        <text:p text:style-name="P1"><text:bookmark text:name="code-block-viewer Copy 4"/><text:span text:style-name="Source_20_Text">Frame 47</text:span></text:p>
        <text:p text:style-name="Preformatted_20_Text"><text:span text:style-name="Source_20_Text">Saclay MQTT client → Broker</text:span></text:p>
        <text:p text:style-name="Preformatted_20_Text"><text:span text:style-name="Source_20_Text">TCP 1886</text:span></text:p>
        <text:p text:style-name="P3"><text:span text:style-name="Source_20_Text">Payload: paket_analiz_testi</text:span></text:p>
      </text:section>
      <text:h text:style-name="Heading_20_3" text:outline-level="3">Aşama 2 — Broker MQTT-SN istemcisine iletiyor</text:h>
      <text:section text:style-name="Sect1" text:name="Section6">
        <text:p text:style-name="P1"><text:bookmark text:name="code-block-viewer Copy 5"/><text:span text:style-name="Source_20_Text">Frame 51</text:span></text:p>
        <text:p text:style-name="Preformatted_20_Text"><text:span text:style-name="Source_20_Text">Broker → emCute Client</text:span></text:p>
        <text:p text:style-name="Preformatted_20_Text"><text:span text:style-name="Source_20_Text">UDP 1885</text:span></text:p>
        <text:p text:style-name="Preformatted_20_Text"><text:span text:style-name="Source_20_Text">MQTT-SN PUBLISH</text:span></text:p>
        <text:p text:style-name="P3"><text:span text:style-name="Source_20_Text">Payload: paket_analiz_testi</text:span></text:p>
      </text:section>
      <text:h text:style-name="Heading_20_3" text:outline-level="3">Aşama 3 — Client onaylıyor</text:h>
      <text:section text:style-name="Sect1" text:name="Section7">
        <text:p text:style-name="P1"><text:bookmark text:name="code-block-viewer Copy 6"/><text:span text:style-name="Source_20_Text">Frame 56</text:span></text:p>
        <text:p text:style-name="Preformatted_20_Text"><text:span text:style-name="Source_20_Text">emCute Client → Broker</text:span></text:p>
        <text:p text:style-name="P3"><text:span text:style-name="Source_20_Text">MQTT-SN PUBACK</text:span></text:p>
      </text:section>
      <text:p text:style-name="Text_20_body">Bu, raporda doğrudan kullanılabilecek güçlü kanıt:</text:p>
      <text:section text:style-name="Sect1" text:name="Section8">
        <text:p text:style-name="P2"><text:bookmark text:name="code-block-viewer Copy 7"/><text:span text:style-name="Source_20_Text">mosquitto_pub → broker → MQTT-SN emCute client</text:span></text:p>
      </text:section>
      <text:p text:style-name="Horizontal_20_Line"/>
      <text:h text:style-name="Heading_20_1" text:outline-level="1">5. Ölçülebilen gecikmeler</text:h>
      <text:p text:style-name="Text_20_body">Bu PCAP üzerinden <text:span text:style-name="Strong_20_Emphasis">üç anlamlı süre</text:span> çıkarılabiliyor.</text:p>
      <text:h text:style-name="Heading_20_2" text:outline-level="2">A. Broker’a gelen MQTT mesajının MQTT-SN client’a çevrilip gönderilme süresi</text:h>
      <text:p text:style-name="Text_20_body">Yani:</text:p>
      <text:section text:style-name="Sect1" text:name="Section9">
        <text:p text:style-name="P1"><text:bookmark text:name="code-block-viewer Copy 8"/><text:span text:style-name="Source_20_Text">MQTT PUBLISH broker’a ulaştı</text:span></text:p>
        <text:p text:style-name="Preformatted_20_Text"><text:span text:style-name="Source_20_Text">→</text:span></text:p>
        <text:p text:style-name="P3"><text:span text:style-name="Source_20_Text">MQTT-SN PUBLISH client’a gönderildi</text:span></text:p>
      </text:section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Ölçüm</text:p>
            </table:table-cell>
            <table:table-cell table:style-name="Table3.A1" office:value-type="string">
              <text:p text:style-name="Table_20_Heading">Süre</text:p>
            </table:table-cell>
          </table:table-row>
        </table:table-header-rows>
        <table:table-row>
          <table:table-cell table:style-name="Table3.A1" office:value-type="string">
            <text:p text:style-name="Table_20_Contents">Minimum</text:p>
          </table:table-cell>
          <table:table-cell table:style-name="Table3.A1" office:value-type="string">
            <text:p text:style-name="Table_20_Contents"><text:span text:style-name="Strong_20_Emphasis">6.50 ms</text:span></text:p>
          </table:table-cell>
        </table:table-row>
        <text:soft-page-break/>
        <table:table-row>
          <table:table-cell table:style-name="Table3.A1" office:value-type="string">
            <text:p text:style-name="Table_20_Contents">Ortalama</text:p>
          </table:table-cell>
          <table:table-cell table:style-name="Table3.A1" office:value-type="string">
            <text:p text:style-name="Table_20_Contents"><text:span text:style-name="Strong_20_Emphasis">10.89 ms</text:span></text:p>
          </table:table-cell>
        </table:table-row>
        <table:table-row>
          <table:table-cell table:style-name="Table3.A1" office:value-type="string">
            <text:p text:style-name="Table_20_Contents">Maksimum</text:p>
          </table:table-cell>
          <table:table-cell table:style-name="Table3.A1" office:value-type="string">
            <text:p text:style-name="Table_20_Contents"><text:span text:style-name="Strong_20_Emphasis">13.70 ms</text:span></text:p>
          </table:table-cell>
        </table:table-row>
      </table:table>
      <text:p text:style-name="Text_20_body">Bu değer, broker’ın MQTT tarafındaki mesajı alıp MQTT-SN tarafına aktarma gecikmesidir.</text:p>
      <text:p text:style-name="Horizontal_20_Line"/>
      <text:h text:style-name="Heading_20_2" text:outline-level="2">B. MQTT-SN PUBLISH → PUBACK süresi</text:h>
      <text:p text:style-name="Text_20_body">Yani:</text:p>
      <text:section text:style-name="Sect1" text:name="Section10">
        <text:p text:style-name="P1"><text:bookmark text:name="code-block-viewer Copy 9"/><text:span text:style-name="Source_20_Text">Broker MQTT-SN PUBLISH gönderdi</text:span></text:p>
        <text:p text:style-name="Preformatted_20_Text"><text:span text:style-name="Source_20_Text">→</text:span></text:p>
        <text:p text:style-name="P3"><text:span text:style-name="Source_20_Text">Client PUBACK döndü</text:span></text:p>
      </text:section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Ölçüm</text:p>
            </table:table-cell>
            <table:table-cell table:style-name="Table4.A1" office:value-type="string">
              <text:p text:style-name="Table_20_Heading">Süre</text:p>
            </table:table-cell>
          </table:table-row>
        </table:table-header-rows>
        <table:table-row>
          <table:table-cell table:style-name="Table4.A1" office:value-type="string">
            <text:p text:style-name="Table_20_Contents">Minimum</text:p>
          </table:table-cell>
          <table:table-cell table:style-name="Table4.A1" office:value-type="string">
            <text:p text:style-name="Table_20_Contents"><text:span text:style-name="Strong_20_Emphasis">14.25 ms</text:span></text:p>
          </table:table-cell>
        </table:table-row>
        <table:table-row>
          <table:table-cell table:style-name="Table4.A1" office:value-type="string">
            <text:p text:style-name="Table_20_Contents">Ortalama</text:p>
          </table:table-cell>
          <table:table-cell table:style-name="Table4.A1" office:value-type="string">
            <text:p text:style-name="Table_20_Contents"><text:span text:style-name="Strong_20_Emphasis">15.95 ms</text:span></text:p>
          </table:table-cell>
        </table:table-row>
        <table:table-row>
          <table:table-cell table:style-name="Table4.A1" office:value-type="string">
            <text:p text:style-name="Table_20_Contents">Maksimum</text:p>
          </table:table-cell>
          <table:table-cell table:style-name="Table4.A1" office:value-type="string">
            <text:p text:style-name="Table_20_Contents"><text:span text:style-name="Strong_20_Emphasis">19.62 ms</text:span></text:p>
          </table:table-cell>
        </table:table-row>
      </table:table>
      <text:p text:style-name="Text_20_body">Bu, MQTT-SN tarafında <text:span text:style-name="Strong_20_Emphasis">mesajın client’a ulaşması ve onayının geri dönmesi</text:span> için geçen süredir.</text:p>
      <text:p text:style-name="Horizontal_20_Line"/>
      <text:h text:style-name="Heading_20_2" text:outline-level="2">C. Broker’a gelen MQTT mesajı → MQTT-SN PUBACK tamamlanma süresi</text:h>
      <text:p text:style-name="Text_20_body">Yani uçtan uca, broker girişinden MQTT-SN onayına kadar:</text:p>
      <text:section text:style-name="Sect1" text:name="Section11">
        <text:p text:style-name="P1"><text:bookmark text:name="code-block-viewer Copy 10"/><text:span text:style-name="Source_20_Text">MQTT PUBLISH broker’a geldi</text:span></text:p>
        <text:p text:style-name="Preformatted_20_Text"><text:span text:style-name="Source_20_Text">→</text:span></text:p>
        <text:p text:style-name="Preformatted_20_Text"><text:span text:style-name="Source_20_Text">Broker MQTT-SN PUBLISH yaptı</text:span></text:p>
        <text:p text:style-name="Preformatted_20_Text"><text:span text:style-name="Source_20_Text">→</text:span></text:p>
        <text:p text:style-name="P3"><text:span text:style-name="Source_20_Text">Client PUBACK döndü</text:span></text:p>
      </text:section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Ölçüm</text:p>
            </table:table-cell>
            <table:table-cell table:style-name="Table5.A1" office:value-type="string">
              <text:p text:style-name="Table_20_Heading">Süre</text:p>
            </table:table-cell>
          </table:table-row>
        </table:table-header-rows>
        <table:table-row>
          <table:table-cell table:style-name="Table5.A1" office:value-type="string">
            <text:p text:style-name="Table_20_Contents">Minimum</text:p>
          </table:table-cell>
          <table:table-cell table:style-name="Table5.A1" office:value-type="string">
            <text:p text:style-name="Table_20_Contents"><text:span text:style-name="Strong_20_Emphasis">20.81 ms</text:span></text:p>
          </table:table-cell>
        </table:table-row>
        <table:table-row>
          <table:table-cell table:style-name="Table5.A1" office:value-type="string">
            <text:p text:style-name="Table_20_Contents">Ortalama</text:p>
          </table:table-cell>
          <table:table-cell table:style-name="Table5.A1" office:value-type="string">
            <text:p text:style-name="Table_20_Contents"><text:span text:style-name="Strong_20_Emphasis">26.84 ms</text:span></text:p>
          </table:table-cell>
        </table:table-row>
        <table:table-row>
          <table:table-cell table:style-name="Table5.A1" office:value-type="string">
            <text:p text:style-name="Table_20_Contents">Maksimum</text:p>
          </table:table-cell>
          <table:table-cell table:style-name="Table5.A1" office:value-type="string">
            <text:p text:style-name="Table_20_Contents"><text:span text:style-name="Strong_20_Emphasis">31.34 ms</text:span></text:p>
          </table:table-cell>
        </table:table-row>
      </table:table>
      <text:p text:style-name="Text_20_body">Bu süreyi raporda şöyle adlandırabilirsin:</text:p>
      <text:p text:style-name="Quotations"><text:span text:style-name="Strong_20_Emphasis">Broker girişinden MQTT-SN teslim onayına kadar geçen işlem süresi</text:span></text:p>
      <text:p text:style-name="Text_20_body">CoAP ile karşılaştırma için en değerli sürelerden biri bu olur.</text:p>
      <text:p text:style-name="Horizontal_20_Line"/>
      <text:h text:style-name="Heading_20_1" text:outline-level="1">6. 10 mesajlık testin ayrıntısı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Mesaj</text:p>
            </table:table-cell>
            <table:table-cell table:style-name="Table6.A1" office:value-type="string">
              <text:p text:style-name="Table_20_Heading">MQTT → MQTT-SN gönderim gecikmesi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tree_msg_1</text:span></text:p>
          </table:table-cell>
          <table:table-cell table:style-name="Table6.A1" office:value-type="string">
            <text:p text:style-name="Table_20_Contents">10.34 ms</text:p>
          </table:table-cell>
        </table:table-row>
        <table:table-row>
          <table:table-cell table:style-name="Table6.A1" office:value-type="string">
            <text:p text:style-name="Table_20_Contents"><text:span text:style-name="Source_20_Text">tree_msg_2</text:span></text:p>
          </table:table-cell>
          <table:table-cell table:style-name="Table6.A1" office:value-type="string">
            <text:p text:style-name="Table_20_Contents">12.33 ms</text:p>
          </table:table-cell>
        </table:table-row>
        <text:soft-page-break/>
        <table:table-row>
          <table:table-cell table:style-name="Table6.A1" office:value-type="string">
            <text:p text:style-name="Table_20_Contents"><text:span text:style-name="Source_20_Text">tree_msg_3</text:span></text:p>
          </table:table-cell>
          <table:table-cell table:style-name="Table6.A1" office:value-type="string">
            <text:p text:style-name="Table_20_Contents">11.72 ms</text:p>
          </table:table-cell>
        </table:table-row>
        <table:table-row>
          <table:table-cell table:style-name="Table6.A1" office:value-type="string">
            <text:p text:style-name="Table_20_Contents"><text:span text:style-name="Source_20_Text">tree_msg_4</text:span></text:p>
          </table:table-cell>
          <table:table-cell table:style-name="Table6.A1" office:value-type="string">
            <text:p text:style-name="Table_20_Contents">11.54 ms</text:p>
          </table:table-cell>
        </table:table-row>
        <table:table-row>
          <table:table-cell table:style-name="Table6.A1" office:value-type="string">
            <text:p text:style-name="Table_20_Contents"><text:span text:style-name="Source_20_Text">tree_msg_5</text:span></text:p>
          </table:table-cell>
          <table:table-cell table:style-name="Table6.A1" office:value-type="string">
            <text:p text:style-name="Table_20_Contents">11.72 ms</text:p>
          </table:table-cell>
        </table:table-row>
        <table:table-row>
          <table:table-cell table:style-name="Table6.A1" office:value-type="string">
            <text:p text:style-name="Table_20_Contents"><text:span text:style-name="Source_20_Text">tree_msg_6</text:span></text:p>
          </table:table-cell>
          <table:table-cell table:style-name="Table6.A1" office:value-type="string">
            <text:p text:style-name="Table_20_Contents">11.99 ms</text:p>
          </table:table-cell>
        </table:table-row>
        <table:table-row>
          <table:table-cell table:style-name="Table6.A1" office:value-type="string">
            <text:p text:style-name="Table_20_Contents"><text:span text:style-name="Source_20_Text">tree_msg_7</text:span></text:p>
          </table:table-cell>
          <table:table-cell table:style-name="Table6.A1" office:value-type="string">
            <text:p text:style-name="Table_20_Contents">11.75 ms</text:p>
          </table:table-cell>
        </table:table-row>
        <table:table-row>
          <table:table-cell table:style-name="Table6.A1" office:value-type="string">
            <text:p text:style-name="Table_20_Contents"><text:span text:style-name="Source_20_Text">tree_msg_8</text:span></text:p>
          </table:table-cell>
          <table:table-cell table:style-name="Table6.A1" office:value-type="string">
            <text:p text:style-name="Table_20_Contents">6.56 ms</text:p>
          </table:table-cell>
        </table:table-row>
        <table:table-row>
          <table:table-cell table:style-name="Table6.A1" office:value-type="string">
            <text:p text:style-name="Table_20_Contents"><text:span text:style-name="Source_20_Text">tree_msg_9</text:span></text:p>
          </table:table-cell>
          <table:table-cell table:style-name="Table6.A1" office:value-type="string">
            <text:p text:style-name="Table_20_Contents">11.66 ms</text:p>
          </table:table-cell>
        </table:table-row>
        <table:table-row>
          <table:table-cell table:style-name="Table6.A1" office:value-type="string">
            <text:p text:style-name="Table_20_Contents"><text:span text:style-name="Source_20_Text">tree_msg_10</text:span></text:p>
          </table:table-cell>
          <table:table-cell table:style-name="Table6.A1" office:value-type="string">
            <text:p text:style-name="Table_20_Contents">6.50 ms</text:p>
          </table:table-cell>
        </table:table-row>
      </table:table>
      <text:p text:style-name="Text_20_body">Ortalama:</text:p>
      <text:section text:style-name="Sect1" text:name="Section12">
        <text:p text:style-name="P2"><text:bookmark text:name="code-block-viewer Copy 11"/><text:span text:style-name="Source_20_Text">10.61 ms</text:span></text:p>
      </text:section>
      <text:p text:style-name="Text_20_body">Bu tabloyu rapora koyabilirsin.</text:p>
      <text:p text:style-name="Horizontal_20_Line"/>
      <text:h text:style-name="Heading_20_1" text:outline-level="1">7. ICMPv6 / Ping analizi</text:h>
      <text:p text:style-name="Text_20_body">PCAP içinde:</text:p>
      <text:section text:style-name="Sect1" text:name="Section13">
        <text:p text:style-name="P1"><text:bookmark text:name="code-block-viewer Copy 12"/><text:span text:style-name="Source_20_Text">145 Echo Request</text:span></text:p>
        <text:p text:style-name="P3"><text:span text:style-name="Source_20_Text">145 Echo Reply</text:span></text:p>
      </text:section>
      <text:p text:style-name="Text_20_body">eşleşmesi var.</text:p>
      <text:p text:style-name="Text_20_body">Bu ping trafiği şu iki adres arasında:</text:p>
      <text:section text:style-name="Sect1" text:name="Section14">
        <text:p text:style-name="P1"><text:bookmark text:name="code-block-viewer Copy 13"/><text:span text:style-name="Source_20_Text">2001:660:3207:400::68</text:span></text:p>
        <text:p text:style-name="Preformatted_20_Text"><text:span text:style-name="Source_20_Text">→</text:span></text:p>
        <text:p text:style-name="P3"><text:span text:style-name="Source_20_Text">2001:660:3207:400::65</text:span></text:p>
      </text:section>
      <text:p text:style-name="Text_20_body">RTT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Ölçüm</text:p>
            </table:table-cell>
            <table:table-cell table:style-name="Table7.A1" office:value-type="string">
              <text:p text:style-name="Table_20_Heading">Süre</text:p>
            </table:table-cell>
          </table:table-row>
        </table:table-header-rows>
        <table:table-row>
          <table:table-cell table:style-name="Table7.A1" office:value-type="string">
            <text:p text:style-name="Table_20_Contents">Minimum RTT</text:p>
          </table:table-cell>
          <table:table-cell table:style-name="Table7.A1" office:value-type="string">
            <text:p text:style-name="Table_20_Contents"><text:span text:style-name="Strong_20_Emphasis">0.183 ms</text:span></text:p>
          </table:table-cell>
        </table:table-row>
        <table:table-row>
          <table:table-cell table:style-name="Table7.A1" office:value-type="string">
            <text:p text:style-name="Table_20_Contents">Ortalama RTT</text:p>
          </table:table-cell>
          <table:table-cell table:style-name="Table7.A1" office:value-type="string">
            <text:p text:style-name="Table_20_Contents"><text:span text:style-name="Strong_20_Emphasis">0.393 ms</text:span></text:p>
          </table:table-cell>
        </table:table-row>
        <table:table-row>
          <table:table-cell table:style-name="Table7.A1" office:value-type="string">
            <text:p text:style-name="Table_20_Contents">Maksimum RTT</text:p>
          </table:table-cell>
          <table:table-cell table:style-name="Table7.A1" office:value-type="string">
            <text:p text:style-name="Table_20_Contents"><text:span text:style-name="Strong_20_Emphasis">0.854 ms</text:span></text:p>
          </table:table-cell>
        </table:table-row>
      </table:table>
      <text:p text:style-name="Text_20_body">Ancak önemli not:</text:p>
      <text:p text:style-name="Quotations">Bu ICMPv6 RTT, PCAP içinde görülen <text:span text:style-name="Source_20_Text">::68 → ::65</text:span> akışına aittir. MQTT-SN emCute client adresi olan <text:span text:style-name="Source_20_Text">2001:660:3207:464:a4cf:e1be:f142:3f06</text:span> için RTT’yi doğrudan bu PCAP’tan çıkarmıyoruz. Ağaç topoloji leaf-client RTT’si için terminalde aldığın <text:span text:style-name="Source_20_Text">ping6</text:span> çıktısını esas almak daha doğrudur.</text:p>
      <text:p text:style-name="Horizontal_20_Line"/>
      <text:h text:style-name="Heading_20_1" text:outline-level="1">8. MQTT-SN keep-alive paketi de var</text:h>
      <text:p text:style-name="Text_20_body">PCAP içinde ayrıca:</text:p>
      <text:section text:style-name="Sect1" text:name="Section15">
        <text:p text:style-name="P2"><text:bookmark text:name="code-block-viewer Copy 14"/><text:span text:style-name="Source_20_Text">MQTT-SN PINGREQ</text:span></text:p>
      </text:section>
      <text:p text:style-name="Text_20_body"><text:soft-page-break/>paketi görülüyor.</text:p>
      <text:p text:style-name="Text_20_body">Bu şu anlama gelir:</text:p>
      <text:section text:style-name="Sect1" text:name="Section16">
        <text:p text:style-name="P2"><text:bookmark text:name="code-block-viewer Copy 15"/><text:span text:style-name="Source_20_Text">MQTT-SN istemcisi broker bağlantısını canlı tutmak için keep-alive mesajı göndermiş.</text:span></text:p>
      </text:section>
      <text:p text:style-name="Horizontal_20_Line"/>
      <text:h text:style-name="Heading_20_1" text:outline-level="1">9. Wireshark’ta neden <text:span text:style-name="Source_20_Text">mqttsn</text:span> filtresi boş çıktı?</text:h>
      <text:p text:style-name="Text_20_body">Sen ekran görüntüsünde:</text:p>
      <text:section text:style-name="Sect1" text:name="Section17">
        <text:p text:style-name="P2"><text:bookmark text:name="code-block-viewer Copy 16"/><text:span text:style-name="Source_20_Text">mqttsn</text:span></text:p>
      </text:section>
      <text:p text:style-name="Text_20_body">filtresini yazdığında paket çıkmamıştı.</text:p>
      <text:p text:style-name="Text_20_body">Ama:</text:p>
      <text:section text:style-name="Sect1" text:name="Section18">
        <text:p text:style-name="P2"><text:bookmark text:name="code-block-viewer Copy 17"/><text:span text:style-name="Source_20_Text">udp.port == 1885</text:span></text:p>
      </text:section>
      <text:p text:style-name="Text_20_body">ile 23 UDP paketi görünüyor.</text:p>
      <text:p text:style-name="Text_20_body">Nedeni şu:</text:p>
      <text:p text:style-name="Quotations">Wireshark bu UDP 1885 trafiğini otomatik olarak MQTT-SN olarak decode etmemiş.</text:p>
      <text:p text:style-name="Text_20_body">Wireshark’ta MQTT-SN için <text:span text:style-name="Source_20_Text">mqttsn</text:span> display filter alanı mevcut; ancak standart dışı veya otomatik tanınmayan trafiği bazen <text:span text:style-name="Strong_20_Emphasis">Decode As</text:span> ile elle protokole eşlemek gerekir. Wireshark’ın “Decode As” özelliği bu tür durumlarda protokol yorumlamasını elle override etmek için kullanılır. </text:p>
      <text:h text:style-name="Heading_20_2" text:outline-level="2">Şunu dene</text:h>
      <text:p text:style-name="Text_20_body">Wireshark’ta UDP 1885 paketlerinden birine sağ tıkla:</text:p>
      <text:section text:style-name="Sect1" text:name="Section19">
        <text:p text:style-name="P2"><text:bookmark text:name="code-block-viewer Copy 18"/><text:span text:style-name="Source_20_Text">Decode As...</text:span></text:p>
      </text:section>
      <text:p text:style-name="Text_20_body">sonra mümkünse:</text:p>
      <text:section text:style-name="Sect1" text:name="Section20">
        <text:p text:style-name="P2"><text:bookmark text:name="code-block-viewer Copy 19"/><text:span text:style-name="Source_20_Text">UDP port 1885 → MQTT-SN</text:span></text:p>
      </text:section>
      <text:p text:style-name="Text_20_body">seç.</text:p>
      <text:p text:style-name="Text_20_body">Sonrasında:</text:p>
      <text:section text:style-name="Sect1" text:name="Section21">
        <text:p text:style-name="P2"><text:bookmark text:name="code-block-viewer Copy 20"/><text:span text:style-name="Source_20_Text">mqttsn</text:span></text:p>
      </text:section>
      <text:p text:style-name="Text_20_body">filtresi paketleri göstermeli.</text:p>
      <text:p text:style-name="Text_20_body">Göstermezse raporda yine güvenle:</text:p>
      <text:section text:style-name="Sect1" text:name="Section22">
        <text:p text:style-name="P2"><text:bookmark text:name="code-block-viewer Copy 21"/><text:span text:style-name="Source_20_Text">udp.port == 1885</text:span></text:p>
      </text:section>
      <text:p text:style-name="Text_20_body">filtresini kullanabilirsin.</text:p>
      <text:p text:style-name="Horizontal_20_Line"><text:soft-page-break/></text:p>
      <text:h text:style-name="Heading_20_1" text:outline-level="1">10. CoAP ile nasıl karşılaştırırsın?</text:h>
      <text:p text:style-name="Text_20_body">Bu deneyden CoAP karşılaştırmasına taşıyabileceğin metrikler: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MQTT-SN’de ölçtüğün</text:p>
            </table:table-cell>
            <table:table-cell table:style-name="Table8.A1" office:value-type="string">
              <text:p text:style-name="Table_20_Heading">CoAP’ta karşılığı</text:p>
            </table:table-cell>
          </table:table-row>
        </table:table-header-rows>
        <table:table-row>
          <table:table-cell table:style-name="Table8.A1" office:value-type="string">
            <text:p text:style-name="Table_20_Contents">10 mesajda teslim başarısı</text:p>
          </table:table-cell>
          <table:table-cell table:style-name="Table8.A1" office:value-type="string">
            <text:p text:style-name="Table_20_Contents">10 GET/POST isteğinde başarı oranı</text:p>
          </table:table-cell>
        </table:table-row>
        <table:table-row>
          <table:table-cell table:style-name="Table8.A1" office:value-type="string">
            <text:p text:style-name="Table_20_Contents">MQTT → MQTT-SN aktarma gecikmesi</text:p>
          </table:table-cell>
          <table:table-cell table:style-name="Table8.A1" office:value-type="string">
            <text:p text:style-name="Table_20_Contents">CoAP request → response süresi</text:p>
          </table:table-cell>
        </table:table-row>
        <table:table-row>
          <table:table-cell table:style-name="Table8.A1" office:value-type="string">
            <text:p text:style-name="Table_20_Contents">MQTT-SN PUBLISH → PUBACK</text:p>
          </table:table-cell>
          <table:table-cell table:style-name="Table8.A1" office:value-type="string">
            <text:p text:style-name="Table_20_Contents">CoAP request → ACK/response</text:p>
          </table:table-cell>
        </table:table-row>
        <table:table-row>
          <table:table-cell table:style-name="Table8.A1" office:value-type="string">
            <text:p text:style-name="Table_20_Contents">Ping RTT</text:p>
          </table:table-cell>
          <table:table-cell table:style-name="Table8.A1" office:value-type="string">
            <text:p text:style-name="Table_20_Contents">Ping RTT</text:p>
          </table:table-cell>
        </table:table-row>
        <table:table-row>
          <table:table-cell table:style-name="Table8.A1" office:value-type="string">
            <text:p text:style-name="Table_20_Contents">UDP 1885 paket sayısı</text:p>
          </table:table-cell>
          <table:table-cell table:style-name="Table8.A1" office:value-type="string">
            <text:p text:style-name="Table_20_Contents">UDP 5683 paket sayısı</text:p>
          </table:table-cell>
        </table:table-row>
      </table:table>
      <text:h text:style-name="Heading_20_2" text:outline-level="2">Rapor için karşılaştırma tablosu şablonu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Metrik</text:p>
            </table:table-cell>
            <table:table-cell table:style-name="Table9.A1" office:value-type="string">
              <text:p text:style-name="Table_20_Heading">MQTT-SN Ağaç</text:p>
            </table:table-cell>
            <table:table-cell table:style-name="Table9.A1" office:value-type="string">
              <text:p text:style-name="Table_20_Heading">CoAP Ağaç</text:p>
            </table:table-cell>
          </table:table-row>
        </table:table-header-rows>
        <table:table-row>
          <table:table-cell table:style-name="Table9.A1" office:value-type="string">
            <text:p text:style-name="Table_20_Contents">Mesaj/istek sayısı</text:p>
          </table:table-cell>
          <table:table-cell table:style-name="Table9.A1" office:value-type="string">
            <text:p text:style-name="Table_20_Contents">10</text:p>
          </table:table-cell>
          <table:table-cell table:style-name="Table9.A1" office:value-type="string">
            <text:p text:style-name="Table_20_Contents">10</text:p>
          </table:table-cell>
        </table:table-row>
        <table:table-row>
          <table:table-cell table:style-name="Table9.A1" office:value-type="string">
            <text:p text:style-name="Table_20_Contents">Başarılı teslim/yanıt</text:p>
          </table:table-cell>
          <table:table-cell table:style-name="Table9.A1" office:value-type="string">
            <text:p text:style-name="Table_20_Contents">10</text:p>
          </table:table-cell>
          <table:table-cell table:style-name="Table9.A1" office:value-type="string">
            <text:p text:style-name="Table_20_Contents">—</text:p>
          </table:table-cell>
        </table:table-row>
        <table:table-row>
          <table:table-cell table:style-name="Table9.A1" office:value-type="string">
            <text:p text:style-name="Table_20_Contents">Başarı oranı</text:p>
          </table:table-cell>
          <table:table-cell table:style-name="Table9.A1" office:value-type="string">
            <text:p text:style-name="Table_20_Contents">%100</text:p>
          </table:table-cell>
          <table:table-cell table:style-name="Table9.A1" office:value-type="string">
            <text:p text:style-name="Table_20_Contents">—</text:p>
          </table:table-cell>
        </table:table-row>
        <table:table-row>
          <table:table-cell table:style-name="Table9.A1" office:value-type="string">
            <text:p text:style-name="Table_20_Contents">Ortalama ağ RTT</text:p>
          </table:table-cell>
          <table:table-cell table:style-name="Table9.A1" office:value-type="string">
            <text:p text:style-name="Table_20_Contents">ayrı ping çıktısından alınacak</text:p>
          </table:table-cell>
          <table:table-cell table:style-name="Table9.A1" office:value-type="string">
            <text:p text:style-name="Table_20_Contents">—</text:p>
          </table:table-cell>
        </table:table-row>
        <table:table-row>
          <table:table-cell table:style-name="Table9.A1" office:value-type="string">
            <text:p text:style-name="Table_20_Contents">Ortalama uygulama tamamlanma süresi</text:p>
          </table:table-cell>
          <table:table-cell table:style-name="Table9.A1" office:value-type="string">
            <text:p text:style-name="Table_20_Contents"><text:span text:style-name="Strong_20_Emphasis">26.84 ms</text:span></text:p>
          </table:table-cell>
          <table:table-cell table:style-name="Table9.A1" office:value-type="string">
            <text:p text:style-name="Table_20_Contents">—</text:p>
          </table:table-cell>
        </table:table-row>
        <table:table-row>
          <table:table-cell table:style-name="Table9.A1" office:value-type="string">
            <text:p text:style-name="Table_20_Contents">Paket taşıma portu</text:p>
          </table:table-cell>
          <table:table-cell table:style-name="Table9.A1" office:value-type="string">
            <text:p text:style-name="Table_20_Contents">UDP 1885</text:p>
          </table:table-cell>
          <table:table-cell table:style-name="Table9.A1" office:value-type="string">
            <text:p text:style-name="Table_20_Contents">UDP 5683</text:p>
          </table:table-cell>
        </table:table-row>
      </table:table>
      <text:p text:style-name="Horizontal_20_Line"/>
      <text:h text:style-name="Heading_20_1" text:outline-level="1">11. Rapora doğrudan yazabileceğin sonuç paragrafı</text:h>
      <text:p text:style-name="Quotations">Ağaç topoloji MQTT-SN deneyinde paket analizi <text:span text:style-name="Source_20_Text">mqttsn_tree.pcap</text:span> dosyası üzerinden gerçekleştirilmiştir. Yakalanan trafik incelendiğinde toplam 562 paket kaydedildiği, bunların 354’ünün ICMPv6, 185’inin TCP ve 23’ünün UDP paketi olduğu görülmüştür. MQTT tarafında TCP 1886 portu üzerinden broker’a iletilen <text:span text:style-name="Source_20_Text">paket_analiz_testi</text:span> ve <text:span text:style-name="Source_20_Text">tree_msg_1</text:span>–<text:span text:style-name="Source_20_Text">tree_msg_10</text:span> mesajlarının, broker tarafından UDP 1885 portu üzerinden MQTT-SN emCute istemcisine başarıyla yönlendirildiği tespit edilmiştir. On bir mesajın tamamı istemciye ulaştırılmış ve her biri için PUBACK yanıtı alınmıştır. Böylece bu kayıt için mesaj teslim başarısı %100 olarak hesaplanmıştır. MQTT mesajının broker’a ulaşmasından MQTT-SN istemcisine aktarılmasına kadar geçen ortalama süre 10.89 ms, MQTT-SN PUBLISH paketinin PUBACK ile onaylanmasına kadar geçen ortalama süre ise 15.95 ms olarak ölçülmüştür. Broker girişinden MQTT-SN teslim onayına kadar geçen ortalama toplam işlem süresi 26.84 ms’dir.</text:p>
      <text:p text:style-name="Horizontal_20_Line"/>
      <text:h text:style-name="Heading_20_2" text:outline-level="2">Kısa sonuç</text:h>
      <text:p text:style-name="Text_20_body">Bu PCAP, bugünkü deney için şu üç şeyi güçlü biçimde kanıtlıyor:</text:p>
      <text:list text:style-name="L1">
        <text:list-item>
          <text:p text:style-name="P5"><text:span text:style-name="Strong_20_Emphasis">MQTT-SN mesaj akışı çalıştı.</text:span> </text:p>
        </text:list-item>
        <text:list-item>
          <text:p text:style-name="P5"><text:soft-page-break/><text:span text:style-name="Strong_20_Emphasis">10 mesajlık testte %100 teslim başarısı var.</text:span> </text:p>
        </text:list-item>
        <text:list-item>
          <text:p text:style-name="P4"><text:span text:style-name="Strong_20_Emphasis">CoAP ile kıyaslanabilecek uygulama gecikmesi değerleri çıkarıldı.</text:span> </text:p>
        </text:list-item>
      </text:list>
      <text:section text:style-name="Sect2" text:name="_r_205_">
        <text:p text:style-name="P6">bunun deney raporunu at </text:p>
      </text:section>
      <text:h text:style-name="Heading_20_1" text:outline-level="1">MQTT-SN Ağaç Topoloji Deney Raporu</text:h>
      <text:h text:style-name="Heading_20_2" text:outline-level="2">FIT IoT-LAB A8-M3 Ortamında Mesajlaşma, Gecikme ve Paket Analizi</text:h>
      <text:h text:style-name="Heading_20_3" text:outline-level="3">1. Deneyin Amacı</text:h>
      <text:p text:style-name="Text_20_body">Bu deneyin amacı, FIT IoT-LAB üzerinde çalışan A8-M3 düğümleri kullanılarak MQTT-SN haberleşmesinin kurulması, mesaj iletim sürecinin doğrulanması ve CoAP protokolü ile ileride yapılacak karşılaştırma için ölçülebilir verilerin elde edilmesidir.</text:p>
      <text:p text:style-name="Text_20_body">Deney kapsamında:</text:p>
      <text:list text:style-name="L2">
        <text:list-item>
          <text:p text:style-name="P8">MQTT-SN broker kurulumu yapılmıştır. </text:p>
        </text:list-item>
        <text:list-item>
          <text:p text:style-name="P8">RIOT OS üzerinde çalışan <text:span text:style-name="Source_20_Text">emCute</text:span> istemcisi broker’a bağlanmıştır. </text:p>
        </text:list-item>
        <text:list-item>
          <text:p text:style-name="P8">Broker üzerinden istemciye mesaj iletimi doğrulanmıştır. </text:p>
        </text:list-item>
        <text:list-item>
          <text:p text:style-name="P8">İstemciden broker yönüne mesaj gönderimi test edilmiştir. </text:p>
        </text:list-item>
        <text:list-item>
          <text:p text:style-name="P8">Ağ gecikmesi için <text:span text:style-name="Source_20_Text">ping6</text:span> testi uygulanmıştır. </text:p>
        </text:list-item>
        <text:list-item>
          <text:p text:style-name="P8"><text:span text:style-name="Source_20_Text">tcpdump</text:span> ile paket kaydı alınmış ve Wireshark üzerinden analiz edilmiştir. </text:p>
        </text:list-item>
        <text:list-item>
          <text:p text:style-name="P7">MQTT-SN ile CoAP karşılaştırmasında kullanılabilecek gecikme ve başarı oranı metrikleri çıkarılmıştır. </text:p>
        </text:list-item>
      </text:list>
      <text:p text:style-name="Horizontal_20_Line"/>
      <text:h text:style-name="Heading_20_2" text:outline-level="2">2. Kullanılan Ortam ve Bileşenler</text:h>
      <text:h text:style-name="Heading_20_3" text:outline-level="3">2.1. Deney Ortamı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Bileşen</text:p>
            </table:table-cell>
            <table:table-cell table:style-name="Table10.A1" office:value-type="string">
              <text:p text:style-name="Table_20_Heading">Açıklama</text:p>
            </table:table-cell>
          </table:table-row>
        </table:table-header-rows>
        <table:table-row>
          <table:table-cell table:style-name="Table10.A1" office:value-type="string">
            <text:p text:style-name="Table_20_Contents">Platform</text:p>
          </table:table-cell>
          <table:table-cell table:style-name="Table10.A1" office:value-type="string">
            <text:p text:style-name="Table_20_Contents">FIT IoT-LAB</text:p>
          </table:table-cell>
        </table:table-row>
        <table:table-row>
          <table:table-cell table:style-name="Table10.A1" office:value-type="string">
            <text:p text:style-name="Table_20_Contents">Site</text:p>
          </table:table-cell>
          <table:table-cell table:style-name="Table10.A1" office:value-type="string">
            <text:p text:style-name="Table_20_Contents">Saclay</text:p>
          </table:table-cell>
        </table:table-row>
        <table:table-row>
          <table:table-cell table:style-name="Table10.A1" office:value-type="string">
            <text:p text:style-name="Table_20_Contents">Düğüm tipi</text:p>
          </table:table-cell>
          <table:table-cell table:style-name="Table10.A1" office:value-type="string">
            <text:p text:style-name="Table_20_Contents">A8-M3</text:p>
          </table:table-cell>
        </table:table-row>
        <table:table-row>
          <table:table-cell table:style-name="Table10.A1" office:value-type="string">
            <text:p text:style-name="Table_20_Contents">İşletim Sistemi</text:p>
          </table:table-cell>
          <table:table-cell table:style-name="Table10.A1" office:value-type="string">
            <text:p text:style-name="Table_20_Contents">RIOT OS</text:p>
          </table:table-cell>
        </table:table-row>
        <table:table-row>
          <table:table-cell table:style-name="Table10.A1" office:value-type="string">
            <text:p text:style-name="Table_20_Contents">MQTT-SN istemcisi</text:p>
          </table:table-cell>
          <table:table-cell table:style-name="Table10.A1" office:value-type="string">
            <text:p text:style-name="Table_20_Contents"><text:span text:style-name="Source_20_Text">emCute</text:span></text:p>
          </table:table-cell>
        </table:table-row>
        <table:table-row>
          <table:table-cell table:style-name="Table10.A1" office:value-type="string">
            <text:p text:style-name="Table_20_Contents">Broker</text:p>
          </table:table-cell>
          <table:table-cell table:style-name="Table10.A1" office:value-type="string">
            <text:p text:style-name="Table_20_Contents"><text:span text:style-name="Source_20_Text">broker_mqtts</text:span></text:p>
          </table:table-cell>
        </table:table-row>
        <table:table-row>
          <table:table-cell table:style-name="Table10.A1" office:value-type="string">
            <text:p text:style-name="Table_20_Contents">MQTT istemcileri</text:p>
          </table:table-cell>
          <table:table-cell table:style-name="Table10.A1" office:value-type="string">
            <text:p text:style-name="Table_20_Contents"><text:span text:style-name="Source_20_Text">mosquitto_pub</text:span>, <text:span text:style-name="Source_20_Text">mosquitto_sub</text:span></text:p>
          </table:table-cell>
        </table:table-row>
        <table:table-row>
          <table:table-cell table:style-name="Table10.A1" office:value-type="string">
            <text:p text:style-name="Table_20_Contents">Paket analizi</text:p>
          </table:table-cell>
          <table:table-cell table:style-name="Table10.A1" office:value-type="string">
            <text:p text:style-name="Table_20_Contents"><text:span text:style-name="Source_20_Text">tcpdump</text:span>, Wireshark</text:p>
          </table:table-cell>
        </table:table-row>
      </table:table>
      <text:p text:style-name="Horizontal_20_Line"/>
      <text:h text:style-name="Heading_20_2" text:outline-level="2">3. Deney Mimarisi</text:h>
      <text:p text:style-name="Text_20_body">Deneyde MQTT-SN trafiği şu genel yapı üzerinde incelenmiştir:</text:p>
      <text:section text:style-name="Sect1" text:name="Section23">
        <text:p text:style-name="P1"><text:bookmark text:name="code-block-viewer Copy 22"/><text:soft-page-break/><text:span text:style-name="Source_20_Text">Saclay Frontend</text:span></text:p>
        <text:p text:style-name="Preformatted_20_Text"><text:span text:style-name="Source_20_Text"><text:s text:c="5"/>|</text:span></text:p>
        <text:p text:style-name="Preformatted_20_Text"><text:span text:style-name="Source_20_Text"><text:s text:c="5"/>| MQTT / TCP 1886</text:span></text:p>
        <text:p text:style-name="Preformatted_20_Text"><text:span text:style-name="Source_20_Text"><text:s text:c="5"/>v</text:span></text:p>
        <text:p text:style-name="Preformatted_20_Text"><text:span text:style-name="Source_20_Text">MQTT-SN Broker</text:span></text:p>
        <text:p text:style-name="Preformatted_20_Text"><text:span text:style-name="Source_20_Text">node-a8-101</text:span></text:p>
        <text:p text:style-name="Preformatted_20_Text"><text:span text:style-name="Source_20_Text"><text:s text:c="5"/>|</text:span></text:p>
        <text:p text:style-name="Preformatted_20_Text"><text:span text:style-name="Source_20_Text"><text:s text:c="5"/>| MQTT-SN / UDP 1885</text:span></text:p>
        <text:p text:style-name="Preformatted_20_Text"><text:span text:style-name="Source_20_Text"><text:s text:c="5"/>v</text:span></text:p>
        <text:p text:style-name="Preformatted_20_Text"><text:span text:style-name="Source_20_Text">emCute Client</text:span></text:p>
        <text:p text:style-name="P3"><text:span text:style-name="Source_20_Text">RIOT M3 düğümü</text:span></text:p>
      </text:section>
      <text:p text:style-name="Text_20_body">Bu yapı, ileride ağaç topoloji ve CoAP karşılaştırması için temel ölçüm altyapısı olarak kullanılacaktır.</text:p>
      <text:p text:style-name="Horizontal_20_Line"/>
      <text:h text:style-name="Heading_20_2" text:outline-level="2">4. Deney Kurulumu</text:h>
      <text:h text:style-name="Heading_20_3" text:outline-level="3">4.1. Broker’ın Başlatılması</text:h>
      <text:p text:style-name="Text_20_body">Broker düğümünde aşağıdaki yapılandırma kullanılmıştır:</text:p>
      <text:section text:style-name="Sect1" text:name="Section24">
        <text:p text:style-name="P1"><text:bookmark text:name="code-block-viewer Copy 23"/><text:span text:style-name="Source_20_Text">trace_output protocol</text:span></text:p>
        <text:p text:style-name="Preformatted_20_Text"><text:span text:style-name="Source_20_Text">listener 1885 INADDR_ANY mqtts</text:span></text:p>
        <text:p text:style-name="Preformatted_20_Text"><text:span text:style-name="Source_20_Text"><text:s text:c="2"/>ipv6 true</text:span></text:p>
        <text:p text:style-name="Preformatted_20_Text"><text:span text:style-name="Source_20_Text">listener 1886 INADDR_ANY</text:span></text:p>
        <text:p text:style-name="P3"><text:span text:style-name="Source_20_Text"><text:s text:c="2"/>ipv6 true</text:span></text:p>
      </text:section>
      <text:p text:style-name="Text_20_body">Broker şu komutla çalıştırılmıştır:</text:p>
      <text:section text:style-name="Sect1" text:name="Section25">
        <text:p text:style-name="P2"><text:bookmark text:name="code-block-viewer Copy 24"/><text:span text:style-name="Source_20_Text">broker_mqtts config.conf</text:span></text:p>
      </text:section>
      <text:p text:style-name="Text_20_body">Broker loglarında şu ifadeler görülmüştür:</text:p>
      <text:section text:style-name="Sect1" text:name="Section26">
        <text:p text:style-name="P1"><text:bookmark text:name="code-block-viewer Copy 25"/><text:span text:style-name="Source_20_Text">MQTT-S protocol starting, listening on port 1885</text:span></text:p>
        <text:p text:style-name="P3"><text:span text:style-name="Source_20_Text">MQTT protocol starting, listening on port 1886</text:span></text:p>
      </text:section>
      <text:p text:style-name="Text_20_body">Bu çıktı, broker’ın hem MQTT-SN hem de MQTT trafiğini dinlediğini göstermektedir.</text:p>
      <text:p text:style-name="Horizontal_20_Line"/>
      <text:h text:style-name="Heading_20_2" text:outline-level="2">5. emCute İstemci Bağlantısı</text:h>
      <text:p text:style-name="Text_20_body">RIOT OS üzerindeki emCute istemcisi broker’a şu komutla bağlanmıştır:</text:p>
      <text:section text:style-name="Sect1" text:name="Section27">
        <text:p text:style-name="P2"><text:bookmark text:name="code-block-viewer Copy 26"/><text:span text:style-name="Source_20_Text">con 2001:660:3207:400::65 1885</text:span></text:p>
      </text:section>
      <text:p text:style-name="Text_20_body">Bağlantının ardından broker logunda:</text:p>
      <text:section text:style-name="Sect1" text:name="Section28">
        <text:p text:style-name="P1"><text:bookmark text:name="code-block-viewer Copy 27"/><text:span text:style-name="Source_20_Text">Client connected to udp port 1885</text:span></text:p>
        <text:p text:style-name="P3"><text:span text:style-name="Source_20_Text">MQTT-S CONNACK returncode 0</text:span></text:p>
      </text:section>
      <text:p text:style-name="Text_20_body">satırları görülmüştür. Bu sonuç, MQTT-SN istemcisinin broker’a başarıyla bağlandığını göstermektedir.</text:p>
      <text:p text:style-name="Horizontal_20_Line"/>
      <text:h text:style-name="Heading_20_2" text:outline-level="2"><text:soft-page-break/>6. Broker’dan İstemciye Mesaj İletimi</text:h>
      <text:p text:style-name="Text_20_body">İstemci tarafında aşağıdaki topic’e abone olunmuştur:</text:p>
      <text:section text:style-name="Sect1" text:name="Section29">
        <text:p text:style-name="P2"><text:bookmark text:name="code-block-viewer Copy 28"/><text:span text:style-name="Source_20_Text">sub test/riot</text:span></text:p>
      </text:section>
      <text:p text:style-name="Text_20_body">Ardından Saclay frontend terminalinden şu mesaj gönderilmiştir:</text:p>
      <text:section text:style-name="Sect1" text:name="Section30">
        <text:p text:style-name="P1"><text:bookmark text:name="code-block-viewer Copy 29"/><text:span text:style-name="Source_20_Text">mosquitto_pub \</text:span></text:p>
        <text:p text:style-name="Preformatted_20_Text"><text:span text:style-name="Source_20_Text">-h 2001:660:3207:400::65 \</text:span></text:p>
        <text:p text:style-name="Preformatted_20_Text"><text:span text:style-name="Source_20_Text">-p 1886 \</text:span></text:p>
        <text:p text:style-name="Preformatted_20_Text"><text:span text:style-name="Source_20_Text">-t test/riot \</text:span></text:p>
        <text:p text:style-name="P3"><text:span text:style-name="Source_20_Text">-m iotlab</text:span></text:p>
      </text:section>
      <text:p text:style-name="Text_20_body">İstemci terminalinde şu çıktı alınmıştır:</text:p>
      <text:section text:style-name="Sect1" text:name="Section31">
        <text:p text:style-name="P1"><text:bookmark text:name="code-block-viewer Copy 30"/><text:span text:style-name="Source_20_Text">### got publication for topic 'test/riot' ###</text:span></text:p>
        <text:p text:style-name="P3"><text:span text:style-name="Source_20_Text">iotlab</text:span></text:p>
      </text:section>
      <text:p text:style-name="Text_20_body">Bu sonuç aşağıdaki akışın başarıyla çalıştığını göstermektedir:</text:p>
      <text:section text:style-name="Sect1" text:name="Section32">
        <text:p text:style-name="P2"><text:bookmark text:name="code-block-viewer Copy 31"/><text:span text:style-name="Source_20_Text">mosquitto_pub → Broker → MQTT-SN emCute Client</text:span></text:p>
      </text:section>
      <text:p text:style-name="Horizontal_20_Line"/>
      <text:h text:style-name="Heading_20_2" text:outline-level="2">7. İstemciden Broker’a Mesaj İletimi</text:h>
      <text:p text:style-name="Text_20_body">Ters yön haberleşmesini test etmek için Saclay frontend üzerinde abone olunmuştur:</text:p>
      <text:section text:style-name="Sect1" text:name="Section33">
        <text:p text:style-name="P1"><text:bookmark text:name="code-block-viewer Copy 32"/><text:span text:style-name="Source_20_Text">mosquitto_sub \</text:span></text:p>
        <text:p text:style-name="Preformatted_20_Text"><text:span text:style-name="Source_20_Text">-h 2001:660:3207:400::65 \</text:span></text:p>
        <text:p text:style-name="Preformatted_20_Text"><text:span text:style-name="Source_20_Text">-p 1886 \</text:span></text:p>
        <text:p text:style-name="Preformatted_20_Text"><text:span text:style-name="Source_20_Text">-t test2/riot \</text:span></text:p>
        <text:p text:style-name="P3"><text:span text:style-name="Source_20_Text">-v</text:span></text:p>
      </text:section>
      <text:p text:style-name="Text_20_body">İstemci tarafında şu komut verilmiştir:</text:p>
      <text:section text:style-name="Sect1" text:name="Section34">
        <text:p text:style-name="P2"><text:bookmark text:name="code-block-viewer Copy 33"/><text:span text:style-name="Source_20_Text">pub test2/riot clienttan_mesaj</text:span></text:p>
      </text:section>
      <text:p text:style-name="Text_20_body">Saclay terminalinde şu çıktı görülmüştür:</text:p>
      <text:section text:style-name="Sect1" text:name="Section35">
        <text:p text:style-name="P2"><text:bookmark text:name="code-block-viewer Copy 34"/><text:span text:style-name="Source_20_Text">test2/riot clienttan_mesaj</text:span></text:p>
      </text:section>
      <text:p text:style-name="Text_20_body">Bu sonuç, aşağıdaki iletişim yönünün de çalıştığını göstermektedir:</text:p>
      <text:section text:style-name="Sect1" text:name="Section36">
        <text:p text:style-name="P2"><text:bookmark text:name="code-block-viewer Copy 35"/><text:span text:style-name="Source_20_Text">emCute Client → MQTT-SN Broker → MQTT Subscriber</text:span></text:p>
      </text:section>
      <text:p text:style-name="Horizontal_20_Line"/>
      <text:h text:style-name="Heading_20_2" text:outline-level="2">8. Çoklu Mesaj İletim Testi</text:h>
      <text:p text:style-name="Text_20_body">Mesaj iletim kararlılığını gözlemlemek amacıyla 10 adet MQTT mesajı art arda gönderilmiştir:</text:p>
      <text:section text:style-name="Sect1" text:name="Section37">
        <text:p text:style-name="P1"><text:bookmark text:name="code-block-viewer Copy 36"/><text:span text:style-name="Source_20_Text">for i in $(seq 1 10); do</text:span></text:p>
        <text:p text:style-name="Preformatted_20_Text"><text:span text:style-name="Source_20_Text"><text:s text:c="2"/>mosquitto_pub \</text:span></text:p>
        <text:p text:style-name="Preformatted_20_Text"><text:span text:style-name="Source_20_Text"><text:s text:c="2"/>-h 2001:660:3207:400::65 \</text:span></text:p>
        <text:p text:style-name="Preformatted_20_Text"><text:span text:style-name="Source_20_Text"><text:s text:c="2"/>-p 1886 \</text:span></text:p>
        <text:p text:style-name="Preformatted_20_Text"><text:span text:style-name="Source_20_Text"><text:s text:c="2"/>-t test/riot \</text:span></text:p>
        <text:p text:style-name="Preformatted_20_Text"><text:span text:style-name="Source_20_Text"><text:s text:c="2"/>-m "tree_msg_$i"</text:span></text:p>
        <text:p text:style-name="Preformatted_20_Text"><text:soft-page-break/><text:span text:style-name="Source_20_Text"><text:s text:c="2"/>sleep 1</text:span></text:p>
        <text:p text:style-name="P3"><text:span text:style-name="Source_20_Text">done</text:span></text:p>
      </text:section>
      <text:p text:style-name="Text_20_body">Paket kaydından elde edilen sonuçlara göre: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Ölçüt</text:p>
            </table:table-cell>
            <table:table-cell table:style-name="Table11.A1" office:value-type="string">
              <text:p text:style-name="Table_20_Heading">Değer</text:p>
            </table:table-cell>
          </table:table-row>
        </table:table-header-rows>
        <table:table-row>
          <table:table-cell table:style-name="Table11.A1" office:value-type="string">
            <text:p text:style-name="Table_20_Contents">Gönderilen mesaj sayısı</text:p>
          </table:table-cell>
          <table:table-cell table:style-name="Table11.A1" office:value-type="string">
            <text:p text:style-name="Table_20_Contents">10</text:p>
          </table:table-cell>
        </table:table-row>
        <table:table-row>
          <table:table-cell table:style-name="Table11.A1" office:value-type="string">
            <text:p text:style-name="Table_20_Contents">İstemciye ulaştırılan mesaj sayısı</text:p>
          </table:table-cell>
          <table:table-cell table:style-name="Table11.A1" office:value-type="string">
            <text:p text:style-name="Table_20_Contents">10</text:p>
          </table:table-cell>
        </table:table-row>
        <table:table-row>
          <table:table-cell table:style-name="Table11.A1" office:value-type="string">
            <text:p text:style-name="Table_20_Contents">MQTT-SN PUBACK sayısı</text:p>
          </table:table-cell>
          <table:table-cell table:style-name="Table11.A1" office:value-type="string">
            <text:p text:style-name="Table_20_Contents">10</text:p>
          </table:table-cell>
        </table:table-row>
        <table:table-row>
          <table:table-cell table:style-name="Table11.A1" office:value-type="string">
            <text:p text:style-name="Table_20_Contents">Mesaj teslim başarısı</text:p>
          </table:table-cell>
          <table:table-cell table:style-name="Table11.A1" office:value-type="string">
            <text:p text:style-name="Table_20_Contents"><text:span text:style-name="Strong_20_Emphasis">%100</text:span></text:p>
          </table:table-cell>
        </table:table-row>
      </table:table>
      <text:p text:style-name="Text_20_body">Bu sonuç, deney sırasında broker’dan MQTT-SN istemcisine yapılan mesaj iletiminin kayıpsız gerçekleştiğini göstermektedir.</text:p>
      <text:p text:style-name="Horizontal_20_Line"/>
      <text:h text:style-name="Heading_20_2" text:outline-level="2">9. Ping / RTT Gecikme Testi</text:h>
      <text:p text:style-name="Text_20_body">Ağ gecikmesini gözlemlemek amacıyla broker adresine <text:span text:style-name="Source_20_Text">ping6</text:span> testi uygulanmıştır.</text:p>
      <text:p text:style-name="Text_20_body">Kayıt edilen PCAP dosyasında görülen ICMPv6 trafiği: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Ölçüt</text:p>
            </table:table-cell>
            <table:table-cell table:style-name="Table12.A1" office:value-type="string">
              <text:p text:style-name="Table_20_Heading">Değer</text:p>
            </table:table-cell>
          </table:table-row>
        </table:table-header-rows>
        <table:table-row>
          <table:table-cell table:style-name="Table12.A1" office:value-type="string">
            <text:p text:style-name="Table_20_Contents">Echo Request</text:p>
          </table:table-cell>
          <table:table-cell table:style-name="Table12.A1" office:value-type="string">
            <text:p text:style-name="Table_20_Contents">145</text:p>
          </table:table-cell>
        </table:table-row>
        <table:table-row>
          <table:table-cell table:style-name="Table12.A1" office:value-type="string">
            <text:p text:style-name="Table_20_Contents">Echo Reply</text:p>
          </table:table-cell>
          <table:table-cell table:style-name="Table12.A1" office:value-type="string">
            <text:p text:style-name="Table_20_Contents">145</text:p>
          </table:table-cell>
        </table:table-row>
        <table:table-row>
          <table:table-cell table:style-name="Table12.A1" office:value-type="string">
            <text:p text:style-name="Table_20_Contents">Paket kaybı</text:p>
          </table:table-cell>
          <table:table-cell table:style-name="Table12.A1" office:value-type="string">
            <text:p text:style-name="Table_20_Contents">%0</text:p>
          </table:table-cell>
        </table:table-row>
        <table:table-row>
          <table:table-cell table:style-name="Table12.A1" office:value-type="string">
            <text:p text:style-name="Table_20_Contents">Minimum RTT</text:p>
          </table:table-cell>
          <table:table-cell table:style-name="Table12.A1" office:value-type="string">
            <text:p text:style-name="Table_20_Contents"><text:span text:style-name="Strong_20_Emphasis">0.183 ms</text:span></text:p>
          </table:table-cell>
        </table:table-row>
        <table:table-row>
          <table:table-cell table:style-name="Table12.A1" office:value-type="string">
            <text:p text:style-name="Table_20_Contents">Ortalama RTT</text:p>
          </table:table-cell>
          <table:table-cell table:style-name="Table12.A1" office:value-type="string">
            <text:p text:style-name="Table_20_Contents"><text:span text:style-name="Strong_20_Emphasis">0.393 ms</text:span></text:p>
          </table:table-cell>
        </table:table-row>
        <table:table-row>
          <table:table-cell table:style-name="Table12.A1" office:value-type="string">
            <text:p text:style-name="Table_20_Contents">Maksimum RTT</text:p>
          </table:table-cell>
          <table:table-cell table:style-name="Table12.A1" office:value-type="string">
            <text:p text:style-name="Table_20_Contents"><text:span text:style-name="Strong_20_Emphasis">0.854 ms</text:span></text:p>
          </table:table-cell>
        </table:table-row>
      </table:table>
      <text:p text:style-name="Text_20_body">Bu RTT değerleri, kaydedilen ICMPv6 akışı üzerinden hesaplanmıştır.</text:p>
      <text:p text:style-name="Quotations">Not: Bu RTT değeri, PCAP içinde görülen <text:span text:style-name="Source_20_Text">2001:660:3207:400::68 → 2001:660:3207:400::65</text:span> ICMPv6 akışına aittir. Daha sonra yapılacak CoAP karşılaştırmasında aynı kaynak-hedef düzeniyle ölçüm alınmalıdır.</text:p>
      <text:p text:style-name="Horizontal_20_Line"/>
      <text:h text:style-name="Heading_20_2" text:outline-level="2">10. Paket Analizi</text:h>
      <text:p text:style-name="Text_20_body">Deney sırasında broker düğümünde şu komut ile paket kaydı alınmıştır:</text:p>
      <text:section text:style-name="Sect1" text:name="Section38">
        <text:p text:style-name="P1"><text:bookmark text:name="code-block-viewer Copy 37"/><text:span text:style-name="Source_20_Text">tcpdump -i eth0 -n -s 0 -w /tmp/mqttsn_tree.pcap \</text:span></text:p>
        <text:p text:style-name="P3"><text:span text:style-name="Source_20_Text">'ip6 and (udp port 1885 or tcp port 1886 or icmp6)'</text:span></text:p>
      </text:section>
      <text:p text:style-name="Text_20_body">Elde edilen <text:span text:style-name="Source_20_Text">.pcap</text:span> dosyası Wireshark üzerinde analiz edilmiştir.</text:p>
      <text:h text:style-name="Heading_20_3" text:outline-level="3">10.1. Genel Paket Dağılımı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Paket Türü</text:p>
            </table:table-cell>
            <table:table-cell table:style-name="Table13.A1" office:value-type="string">
              <text:p text:style-name="Table_20_Heading">Sayı</text:p>
            </table:table-cell>
          </table:table-row>
        </table:table-header-rows>
        <table:table-row>
          <table:table-cell table:style-name="Table13.A1" office:value-type="string">
            <text:p text:style-name="Table_20_Contents">Toplam paket</text:p>
          </table:table-cell>
          <table:table-cell table:style-name="Table13.A1" office:value-type="string">
            <text:p text:style-name="Table_20_Contents"><text:span text:style-name="Strong_20_Emphasis">562</text:span></text:p>
          </table:table-cell>
        </table:table-row>
        <table:table-row>
          <table:table-cell table:style-name="Table13.A1" office:value-type="string">
            <text:p text:style-name="Table_20_Contents">ICMPv6</text:p>
          </table:table-cell>
          <table:table-cell table:style-name="Table13.A1" office:value-type="string">
            <text:p text:style-name="Table_20_Contents"><text:span text:style-name="Strong_20_Emphasis">354</text:span></text:p>
          </table:table-cell>
        </table:table-row>
        <table:table-row>
          <table:table-cell table:style-name="Table13.A1" office:value-type="string">
            <text:p text:style-name="Table_20_Contents">TCP</text:p>
          </table:table-cell>
          <table:table-cell table:style-name="Table13.A1" office:value-type="string">
            <text:p text:style-name="Table_20_Contents"><text:span text:style-name="Strong_20_Emphasis">185</text:span></text:p>
          </table:table-cell>
        </table:table-row>
        <text:soft-page-break/>
        <table:table-row>
          <table:table-cell table:style-name="Table13.A1" office:value-type="string">
            <text:p text:style-name="Table_20_Contents">UDP</text:p>
          </table:table-cell>
          <table:table-cell table:style-name="Table13.A1" office:value-type="string">
            <text:p text:style-name="Table_20_Contents"><text:span text:style-name="Strong_20_Emphasis">23</text:span></text:p>
          </table:table-cell>
        </table:table-row>
      </table:table>
      <text:p text:style-name="Horizontal_20_Line"/>
      <text:h text:style-name="Heading_20_2" text:outline-level="2">11. MQTT / MQTT-SN Paket Akışı</text:h>
      <text:p text:style-name="Text_20_body">PCAP analizi sonucunda şu mesajların broker’dan MQTT-SN istemcisine ulaştırıldığı görülmüştür:</text:p>
      <text:section text:style-name="Sect1" text:name="Section39">
        <text:p text:style-name="P1"><text:bookmark text:name="code-block-viewer Copy 38"/><text:span text:style-name="Source_20_Text">paket_analiz_testi</text:span></text:p>
        <text:p text:style-name="Preformatted_20_Text"><text:span text:style-name="Source_20_Text">tree_msg_1</text:span></text:p>
        <text:p text:style-name="Preformatted_20_Text"><text:span text:style-name="Source_20_Text">tree_msg_2</text:span></text:p>
        <text:p text:style-name="Preformatted_20_Text"><text:span text:style-name="Source_20_Text">tree_msg_3</text:span></text:p>
        <text:p text:style-name="Preformatted_20_Text"><text:span text:style-name="Source_20_Text">tree_msg_4</text:span></text:p>
        <text:p text:style-name="Preformatted_20_Text"><text:span text:style-name="Source_20_Text">tree_msg_5</text:span></text:p>
        <text:p text:style-name="Preformatted_20_Text"><text:span text:style-name="Source_20_Text">tree_msg_6</text:span></text:p>
        <text:p text:style-name="Preformatted_20_Text"><text:span text:style-name="Source_20_Text">tree_msg_7</text:span></text:p>
        <text:p text:style-name="Preformatted_20_Text"><text:span text:style-name="Source_20_Text">tree_msg_8</text:span></text:p>
        <text:p text:style-name="Preformatted_20_Text"><text:span text:style-name="Source_20_Text">tree_msg_9</text:span></text:p>
        <text:p text:style-name="P3"><text:span text:style-name="Source_20_Text">tree_msg_10</text:span></text:p>
      </text:section>
      <text:p text:style-name="Text_20_body">Toplam:</text:p>
      <text:section text:style-name="Sect1" text:name="Section40">
        <text:p text:style-name="P1"><text:bookmark text:name="code-block-viewer Copy 39"/><text:span text:style-name="Source_20_Text">11 mesaj gönderildi</text:span></text:p>
        <text:p text:style-name="Preformatted_20_Text"><text:span text:style-name="Source_20_Text">11 mesaj MQTT-SN istemcisine iletildi</text:span></text:p>
        <text:p text:style-name="P3"><text:span text:style-name="Source_20_Text">11 PUBACK alındı</text:span></text:p>
      </text:section>
      <text:p text:style-name="Text_20_body">Dolayısıyla genel iletim başarısı:</text:p>
      <text:section text:style-name="Sect1" text:name="Section41">
        <text:p text:style-name="P2"><text:bookmark text:name="code-block-viewer Copy 40"/><text:span text:style-name="Source_20_Text">11 / 11 = %100</text:span></text:p>
      </text:section>
      <text:p text:style-name="Horizontal_20_Line"/>
      <text:h text:style-name="Heading_20_2" text:outline-level="2">12. Paket Bazlı Gecikme Analizi</text:h>
      <text:p text:style-name="Text_20_body">Paket kayıtları üzerinden üç farklı süre hesaplanmıştır.</text:p>
      <text:h text:style-name="Heading_20_3" text:outline-level="3">12.1. MQTT Mesajının Broker’dan MQTT-SN İstemcisine Aktarılma Süresi</text:h>
      <text:p text:style-name="Text_20_body">Bu süre:</text:p>
      <text:section text:style-name="Sect1" text:name="Section42">
        <text:p text:style-name="P1"><text:bookmark text:name="code-block-viewer Copy 41"/><text:span text:style-name="Source_20_Text">MQTT PUBLISH broker’a ulaştı</text:span></text:p>
        <text:p text:style-name="Preformatted_20_Text"><text:span text:style-name="Source_20_Text">→</text:span></text:p>
        <text:p text:style-name="P3"><text:span text:style-name="Source_20_Text">MQTT-SN PUBLISH istemciye gönderildi</text:span></text:p>
      </text:section>
      <text:p text:style-name="Text_20_body">arasındaki farktır.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Table_20_Heading">Ölçüt</text:p>
            </table:table-cell>
            <table:table-cell table:style-name="Table14.A1" office:value-type="string">
              <text:p text:style-name="Table_20_Heading">Süre</text:p>
            </table:table-cell>
          </table:table-row>
        </table:table-header-rows>
        <table:table-row>
          <table:table-cell table:style-name="Table14.A1" office:value-type="string">
            <text:p text:style-name="Table_20_Contents">Minimum</text:p>
          </table:table-cell>
          <table:table-cell table:style-name="Table14.A1" office:value-type="string">
            <text:p text:style-name="Table_20_Contents"><text:span text:style-name="Strong_20_Emphasis">6.500 ms</text:span></text:p>
          </table:table-cell>
        </table:table-row>
        <table:table-row>
          <table:table-cell table:style-name="Table14.A1" office:value-type="string">
            <text:p text:style-name="Table_20_Contents">Ortalama</text:p>
          </table:table-cell>
          <table:table-cell table:style-name="Table14.A1" office:value-type="string">
            <text:p text:style-name="Table_20_Contents"><text:span text:style-name="Strong_20_Emphasis">10.892 ms</text:span></text:p>
          </table:table-cell>
        </table:table-row>
        <table:table-row>
          <table:table-cell table:style-name="Table14.A1" office:value-type="string">
            <text:p text:style-name="Table_20_Contents">Maksimum</text:p>
          </table:table-cell>
          <table:table-cell table:style-name="Table14.A1" office:value-type="string">
            <text:p text:style-name="Table_20_Contents"><text:span text:style-name="Strong_20_Emphasis">13.702 ms</text:span></text:p>
          </table:table-cell>
        </table:table-row>
      </table:table>
      <text:p text:style-name="Horizontal_20_Line"/>
      <text:h text:style-name="Heading_20_3" text:outline-level="3">12.2. MQTT-SN PUBLISH → PUBACK Süresi</text:h>
      <text:p text:style-name="Text_20_body">Bu süre:</text:p>
      <text:section text:style-name="Sect1" text:name="Section43">
        <text:p text:style-name="P1"><text:bookmark text:name="code-block-viewer Copy 42"/><text:span text:style-name="Source_20_Text">Broker MQTT-SN PUBLISH gönderdi</text:span></text:p>
        <text:p text:style-name="Preformatted_20_Text"><text:soft-page-break/><text:span text:style-name="Source_20_Text">→</text:span></text:p>
        <text:p text:style-name="P3"><text:span text:style-name="Source_20_Text">İstemciden PUBACK döndü</text:span></text:p>
      </text:section>
      <text:p text:style-name="Text_20_body">arasındaki farktır.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Table_20_Heading">Ölçüt</text:p>
            </table:table-cell>
            <table:table-cell table:style-name="Table15.A1" office:value-type="string">
              <text:p text:style-name="Table_20_Heading">Süre</text:p>
            </table:table-cell>
          </table:table-row>
        </table:table-header-rows>
        <table:table-row>
          <table:table-cell table:style-name="Table15.A1" office:value-type="string">
            <text:p text:style-name="Table_20_Contents">Minimum</text:p>
          </table:table-cell>
          <table:table-cell table:style-name="Table15.A1" office:value-type="string">
            <text:p text:style-name="Table_20_Contents"><text:span text:style-name="Strong_20_Emphasis">14.252 ms</text:span></text:p>
          </table:table-cell>
        </table:table-row>
        <table:table-row>
          <table:table-cell table:style-name="Table15.A1" office:value-type="string">
            <text:p text:style-name="Table_20_Contents">Ortalama</text:p>
          </table:table-cell>
          <table:table-cell table:style-name="Table15.A1" office:value-type="string">
            <text:p text:style-name="Table_20_Contents"><text:span text:style-name="Strong_20_Emphasis">15.949 ms</text:span></text:p>
          </table:table-cell>
        </table:table-row>
        <table:table-row>
          <table:table-cell table:style-name="Table15.A1" office:value-type="string">
            <text:p text:style-name="Table_20_Contents">Maksimum</text:p>
          </table:table-cell>
          <table:table-cell table:style-name="Table15.A1" office:value-type="string">
            <text:p text:style-name="Table_20_Contents"><text:span text:style-name="Strong_20_Emphasis">19.622 ms</text:span></text:p>
          </table:table-cell>
        </table:table-row>
      </table:table>
      <text:p text:style-name="Horizontal_20_Line"/>
      <text:h text:style-name="Heading_20_3" text:outline-level="3">12.3. Broker Girişinden Teslim Onayına Kadar Toplam Süre</text:h>
      <text:p text:style-name="Text_20_body">Bu süre:</text:p>
      <text:section text:style-name="Sect1" text:name="Section44">
        <text:p text:style-name="P1"><text:bookmark text:name="code-block-viewer Copy 43"/><text:span text:style-name="Source_20_Text">MQTT mesajı broker’a ulaştı</text:span></text:p>
        <text:p text:style-name="Preformatted_20_Text"><text:span text:style-name="Source_20_Text">→</text:span></text:p>
        <text:p text:style-name="Preformatted_20_Text"><text:span text:style-name="Source_20_Text">Broker MQTT-SN PUBLISH gönderdi</text:span></text:p>
        <text:p text:style-name="Preformatted_20_Text"><text:span text:style-name="Source_20_Text">→</text:span></text:p>
        <text:p text:style-name="P3"><text:span text:style-name="Source_20_Text">İstemciden PUBACK alındı</text:span></text:p>
      </text:section>
      <text:p text:style-name="Text_20_body">sürecinin tamamıdır.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Table_20_Heading">Ölçüt</text:p>
            </table:table-cell>
            <table:table-cell table:style-name="Table16.A1" office:value-type="string">
              <text:p text:style-name="Table_20_Heading">Süre</text:p>
            </table:table-cell>
          </table:table-row>
        </table:table-header-rows>
        <table:table-row>
          <table:table-cell table:style-name="Table16.A1" office:value-type="string">
            <text:p text:style-name="Table_20_Contents">Minimum</text:p>
          </table:table-cell>
          <table:table-cell table:style-name="Table16.A1" office:value-type="string">
            <text:p text:style-name="Table_20_Contents"><text:span text:style-name="Strong_20_Emphasis">20.813 ms</text:span></text:p>
          </table:table-cell>
        </table:table-row>
        <table:table-row>
          <table:table-cell table:style-name="Table16.A1" office:value-type="string">
            <text:p text:style-name="Table_20_Contents">Ortalama</text:p>
          </table:table-cell>
          <table:table-cell table:style-name="Table16.A1" office:value-type="string">
            <text:p text:style-name="Table_20_Contents"><text:span text:style-name="Strong_20_Emphasis">26.841 ms</text:span></text:p>
          </table:table-cell>
        </table:table-row>
        <table:table-row>
          <table:table-cell table:style-name="Table16.A1" office:value-type="string">
            <text:p text:style-name="Table_20_Contents">Maksimum</text:p>
          </table:table-cell>
          <table:table-cell table:style-name="Table16.A1" office:value-type="string">
            <text:p text:style-name="Table_20_Contents"><text:span text:style-name="Strong_20_Emphasis">31.341 ms</text:span></text:p>
          </table:table-cell>
        </table:table-row>
      </table:table>
      <text:p text:style-name="Text_20_body">Bu değer, ileride CoAP deneyindeki <text:span text:style-name="Strong_20_Emphasis">request-response tamamlanma süresi</text:span> ile karşılaştırmak için kullanılabilir.</text:p>
      <text:p text:style-name="Horizontal_20_Line"/>
      <text:h text:style-name="Heading_20_2" text:outline-level="2">13. 10 Mesajlık Test İçin Ayrıntılı Süreler</text:h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Mesaj</text:p>
            </table:table-cell>
            <table:table-cell table:style-name="Table17.A1" office:value-type="string">
              <text:p text:style-name="Table_20_Heading">MQTT → MQTT-SN Aktarım Süresi</text:p>
            </table:table-cell>
          </table:table-row>
        </table:table-header-rows>
        <table:table-row>
          <table:table-cell table:style-name="Table17.A1" office:value-type="string">
            <text:p text:style-name="Table_20_Contents"><text:span text:style-name="Source_20_Text">tree_msg_1</text:span></text:p>
          </table:table-cell>
          <table:table-cell table:style-name="Table17.A1" office:value-type="string">
            <text:p text:style-name="Table_20_Contents">10.345 m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tree_msg_2</text:span></text:p>
          </table:table-cell>
          <table:table-cell table:style-name="Table17.A1" office:value-type="string">
            <text:p text:style-name="Table_20_Contents">12.329 m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tree_msg_3</text:span></text:p>
          </table:table-cell>
          <table:table-cell table:style-name="Table17.A1" office:value-type="string">
            <text:p text:style-name="Table_20_Contents">11.719 m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tree_msg_4</text:span></text:p>
          </table:table-cell>
          <table:table-cell table:style-name="Table17.A1" office:value-type="string">
            <text:p text:style-name="Table_20_Contents">11.535 m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tree_msg_5</text:span></text:p>
          </table:table-cell>
          <table:table-cell table:style-name="Table17.A1" office:value-type="string">
            <text:p text:style-name="Table_20_Contents">11.719 m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tree_msg_6</text:span></text:p>
          </table:table-cell>
          <table:table-cell table:style-name="Table17.A1" office:value-type="string">
            <text:p text:style-name="Table_20_Contents">11.993 m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tree_msg_7</text:span></text:p>
          </table:table-cell>
          <table:table-cell table:style-name="Table17.A1" office:value-type="string">
            <text:p text:style-name="Table_20_Contents">11.749 m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tree_msg_8</text:span></text:p>
          </table:table-cell>
          <table:table-cell table:style-name="Table17.A1" office:value-type="string">
            <text:p text:style-name="Table_20_Contents">6.561 m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tree_msg_9</text:span></text:p>
          </table:table-cell>
          <table:table-cell table:style-name="Table17.A1" office:value-type="string">
            <text:p text:style-name="Table_20_Contents">11.657 m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tree_msg_10</text:span></text:p>
          </table:table-cell>
          <table:table-cell table:style-name="Table17.A1" office:value-type="string">
            <text:p text:style-name="Table_20_Contents">6.500 ms</text:p>
          </table:table-cell>
        </table:table-row>
      </table:table>
      <text:p text:style-name="Text_20_body">Ortalama:</text:p>
      <text:section text:style-name="Sect1" text:name="Section45">
        <text:p text:style-name="P2"><text:bookmark text:name="code-block-viewer Copy 44"/><text:span text:style-name="Source_20_Text">10.611 ms</text:span></text:p>
      </text:section>
      <text:p text:style-name="Horizontal_20_Line"/>
      <text:h text:style-name="Heading_20_2" text:outline-level="2"><text:soft-page-break/>14. Wireshark Bulguları</text:h>
      <text:p text:style-name="Text_20_body">Wireshark üzerinde şu filtreler kullanılmıştır:</text:p>
      <text:h text:style-name="Heading_20_3" text:outline-level="3">MQTT-SN trafiği</text:h>
      <text:section text:style-name="Sect1" text:name="Section46">
        <text:p text:style-name="P2"><text:bookmark text:name="code-block-viewer Copy 45"/><text:span text:style-name="Source_20_Text">udp.port == 1885</text:span></text:p>
      </text:section>
      <text:h text:style-name="Heading_20_3" text:outline-level="3">MQTT trafiği</text:h>
      <text:section text:style-name="Sect1" text:name="Section47">
        <text:p text:style-name="P2"><text:bookmark text:name="code-block-viewer Copy 46"/><text:span text:style-name="Source_20_Text">tcp.port == 1886</text:span></text:p>
      </text:section>
      <text:h text:style-name="Heading_20_3" text:outline-level="3">ICMPv6 trafiği</text:h>
      <text:section text:style-name="Sect1" text:name="Section48">
        <text:p text:style-name="P2"><text:bookmark text:name="code-block-viewer Copy 47"/><text:span text:style-name="Source_20_Text">icmpv6</text:span></text:p>
      </text:section>
      <text:h text:style-name="Heading_20_3" text:outline-level="3">Gözlemler</text:h>
      <text:list text:style-name="L3">
        <text:list-item>
          <text:p text:style-name="P10"><text:span text:style-name="Source_20_Text">tcp.port == 1886</text:span> filtresi ile MQTT istemcilerinin broker ile haberleşmesi görülmüştür. </text:p>
        </text:list-item>
        <text:list-item>
          <text:p text:style-name="P10"><text:span text:style-name="Source_20_Text">udp.port == 1885</text:span> filtresi ile broker ile MQTT-SN istemcisi arasındaki trafik gözlemlenmiştir. </text:p>
        </text:list-item>
        <text:list-item>
          <text:p text:style-name="P10"><text:span text:style-name="Source_20_Text">icmpv6</text:span> filtresi ile ping paketleri incelenmiştir. </text:p>
        </text:list-item>
        <text:list-item>
          <text:p text:style-name="P9">MQTT-SN trafiği Wireshark tarafından doğrudan <text:span text:style-name="Source_20_Text">mqttsn</text:span> olarak ayrıştırılmadığı için <text:span text:style-name="Source_20_Text">udp.port == 1885</text:span> filtresi kullanılmıştır. </text:p>
        </text:list-item>
      </text:list>
      <text:p text:style-name="Horizontal_20_Line"/>
      <text:h text:style-name="Heading_20_2" text:outline-level="2">15. CoAP ile Karşılaştırmada Kullanılabilecek Metrikler</text:h>
      <text:p text:style-name="Text_20_body">Bu deneyde elde edilen MQTT-SN verileri, aynı topoloji altında CoAP deneyleri ile karşılaştırılabilir.</text:p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Karşılaştırma Metrikleri</text:p>
            </table:table-cell>
            <table:table-cell table:style-name="Table18.A1" office:value-type="string">
              <text:p text:style-name="Table_20_Heading">MQTT-SN Deneyi</text:p>
            </table:table-cell>
            <table:table-cell table:style-name="Table18.A1" office:value-type="string">
              <text:p text:style-name="Table_20_Heading">CoAP Deneyinde Ölçülecek</text:p>
            </table:table-cell>
          </table:table-row>
        </table:table-header-rows>
        <table:table-row>
          <table:table-cell table:style-name="Table18.A1" office:value-type="string">
            <text:p text:style-name="Table_20_Contents">Paket taşıma portu</text:p>
          </table:table-cell>
          <table:table-cell table:style-name="Table18.A1" office:value-type="string">
            <text:p text:style-name="Table_20_Contents">UDP 1885</text:p>
          </table:table-cell>
          <table:table-cell table:style-name="Table18.A1" office:value-type="string">
            <text:p text:style-name="Table_20_Contents">UDP 5683</text:p>
          </table:table-cell>
        </table:table-row>
        <table:table-row>
          <table:table-cell table:style-name="Table18.A1" office:value-type="string">
            <text:p text:style-name="Table_20_Contents">Mesaj / istek sayısı</text:p>
          </table:table-cell>
          <table:table-cell table:style-name="Table18.A1" office:value-type="string">
            <text:p text:style-name="Table_20_Contents">10</text:p>
          </table:table-cell>
          <table:table-cell table:style-name="Table18.A1" office:value-type="string">
            <text:p text:style-name="Table_20_Contents">10</text:p>
          </table:table-cell>
        </table:table-row>
        <table:table-row>
          <table:table-cell table:style-name="Table18.A1" office:value-type="string">
            <text:p text:style-name="Table_20_Contents">Başarı oranı</text:p>
          </table:table-cell>
          <table:table-cell table:style-name="Table18.A1" office:value-type="string">
            <text:p text:style-name="Table_20_Contents">%100</text:p>
          </table:table-cell>
          <table:table-cell table:style-name="Table18.A1" office:value-type="string">
            <text:p text:style-name="Table_20_Contents">Ölçülecek</text:p>
          </table:table-cell>
        </table:table-row>
        <table:table-row>
          <table:table-cell table:style-name="Table18.A1" office:value-type="string">
            <text:p text:style-name="Table_20_Contents">Ağ RTT ortalaması</text:p>
          </table:table-cell>
          <table:table-cell table:style-name="Table18.A1" office:value-type="string">
            <text:p text:style-name="Table_20_Contents">0.393 ms</text:p>
          </table:table-cell>
          <table:table-cell table:style-name="Table18.A1" office:value-type="string">
            <text:p text:style-name="Table_20_Contents">Ölçülecek</text:p>
          </table:table-cell>
        </table:table-row>
        <table:table-row>
          <table:table-cell table:style-name="Table18.A1" office:value-type="string">
            <text:p text:style-name="Table_20_Contents">Uygulama aktarım süresi</text:p>
          </table:table-cell>
          <table:table-cell table:style-name="Table18.A1" office:value-type="string">
            <text:p text:style-name="Table_20_Contents">10.892 ms</text:p>
          </table:table-cell>
          <table:table-cell table:style-name="Table18.A1" office:value-type="string">
            <text:p text:style-name="Table_20_Contents">CoAP request → response</text:p>
          </table:table-cell>
        </table:table-row>
        <table:table-row>
          <table:table-cell table:style-name="Table18.A1" office:value-type="string">
            <text:p text:style-name="Table_20_Contents">Teslim onayı süresi</text:p>
          </table:table-cell>
          <table:table-cell table:style-name="Table18.A1" office:value-type="string">
            <text:p text:style-name="Table_20_Contents">15.949 ms</text:p>
          </table:table-cell>
          <table:table-cell table:style-name="Table18.A1" office:value-type="string">
            <text:p text:style-name="Table_20_Contents">CoAP ACK / response süresi</text:p>
          </table:table-cell>
        </table:table-row>
        <table:table-row>
          <table:table-cell table:style-name="Table18.A1" office:value-type="string">
            <text:p text:style-name="Table_20_Contents">Toplam işlem süresi</text:p>
          </table:table-cell>
          <table:table-cell table:style-name="Table18.A1" office:value-type="string">
            <text:p text:style-name="Table_20_Contents">26.841 ms</text:p>
          </table:table-cell>
          <table:table-cell table:style-name="Table18.A1" office:value-type="string">
            <text:p text:style-name="Table_20_Contents">CoAP toplam yanıt süresi</text:p>
          </table:table-cell>
        </table:table-row>
      </table:table>
      <text:p text:style-name="Horizontal_20_Line"/>
      <text:h text:style-name="Heading_20_2" text:outline-level="2">16. Deneyin Genel Değerlendirmesi</text:h>
      <text:p text:style-name="Text_20_body">Bu deneyde MQTT-SN protokolü FIT IoT-LAB ortamında başarıyla kurulmuş ve çift yönlü mesaj iletimi doğrulanmıştır. Broker üzerinden istemciye mesaj gönderimi ve istemciden broker yönüne publish işlemi başarılı biçimde gerçekleştirilmiştir.</text:p>
      <text:p text:style-name="Text_20_body">Paket analizi sonuçlarına göre:</text:p>
      <text:list text:style-name="L4">
        <text:list-item>
          <text:p text:style-name="P12"><text:soft-page-break/>MQTT-SN istemcisine gönderilen 11 mesajın tamamı başarıyla iletilmiştir. </text:p>
        </text:list-item>
        <text:list-item>
          <text:p text:style-name="P12">İletim başarısı %100 olarak ölçülmüştür. </text:p>
        </text:list-item>
        <text:list-item>
          <text:p text:style-name="P12">Broker’a gelen MQTT mesajının MQTT-SN istemcisine aktarılma süresi ortalama 10.892 ms olarak bulunmuştur. </text:p>
        </text:list-item>
        <text:list-item>
          <text:p text:style-name="P12">MQTT-SN PUBLISH paketinin istemci tarafından onaylanması ortalama 15.949 ms sürmüştür. </text:p>
        </text:list-item>
        <text:list-item>
          <text:p text:style-name="P11">Broker girişinden teslim onayına kadar geçen toplam süre ortalama 26.841 ms’dir. </text:p>
        </text:list-item>
      </text:list>
      <text:p text:style-name="Text_20_body">Bu sonuçlar, sonraki aşamada yapılacak CoAP ağaç topoloji deneyinin değerlendirilmesi için doğrudan karşılaştırma tabanı sağlayacaktı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4:47:12.573635347</meta:creation-date>
    <dc:date>2026-05-17T14:47:39.498123607</dc:date>
    <meta:editing-duration>PT28S</meta:editing-duration>
    <meta:editing-cycles>1</meta:editing-cycles>
    <meta:document-statistic meta:table-count="18" meta:image-count="0" meta:object-count="0" meta:page-count="14" meta:paragraph-count="520" meta:word-count="1930" meta:character-count="13630" meta:non-whitespace-character-count="12166"/>
    <meta:generator>LibreOffice/24.2.7.2$Linux_X86_64 LibreOffice_project/420$Build-2</meta:generator>
  </office:meta>
</office:document-meta>
</file>